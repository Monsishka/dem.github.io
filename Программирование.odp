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Mono" svg:font-family="'Liberation Mono', 'Courier New', Cousine, 'DejaVu Sans Mono'" style:font-family-generic="modern" style:font-pitch="variable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11cm" fo:min-width="15.184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7.25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3.286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6.75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0" style:family="paragraph">
      <style:paragraph-properties fo:margin-top="0cm" fo:margin-bottom="0cm" fo:line-height="90%"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3" style:family="paragraph">
      <style:paragraph-properties fo:margin-top="0cm" fo:margin-bottom="0cm" fo:line-height="100%" fo:text-align="start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15" style:family="paragraph">
      <style:paragraph-properties fo:margin-top="0cm" fo:margin-bottom="0cm" fo:line-height="100%" fo:text-align="start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26pt" style:font-size-asian="26pt" style:font-size-complex="26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42pt" style:font-size-asian="42pt" style:font-size-complex="42pt"/>
    </style:style>
    <style:style style:name="P26" style:family="paragraph">
      <loext:graphic-properties draw:fill="none"/>
    </style:style>
    <style:style style:name="P27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 Light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2pt" fo:letter-spacing="normal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Программирование" draw:style-name="dp1" draw:master-page-name="Title" presentation:presentation-page-layout-name="AL1T0">
        <draw:frame draw:name="Shape 77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Программирование</text:span></text:p>
          </draw:text-box>
        </draw:frame>
        <draw:frame draw:name="Shape 78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у стороны квадрата. Вывести на экран пл" draw:style-name="dp1" draw:master-page-name="Title_20_and_20_Content" presentation:presentation-page-layout-name="AL2T11">
        <draw:frame draw:name="Shape 80" presentation:style-name="pr4" draw:text-style-name="P6" draw:layer="layout" svg:width="26.176cm" svg:height="4.465cm" draw:transform="rotate (-0.00174532925199447) translate (0.008cm 0.489cm)" presentation:class="title" presentation:user-transformed="true">
          <draw:text-box>
            <text:p text:style-name="P5"><text:span text:style-name="T2">Пользователь вводит длину стороны квадрата. Вывести на экран площадь квадрата.</text:span></text:p>
          </draw:text-box>
        </draw:frame>
        <draw:custom-shape draw:name="Shape 81" draw:style-name="gr2" draw:text-style-name="P8" draw:layer="layout" svg:width="15.683cm" svg:height="8.369cm" svg:x="0.5cm" svg:y="6.131cm">
          <text:p text:style-name="P7"><text:span text:style-name="T3"># Ввод длины стороны квадрата</text:span></text:p>
          <text:p text:style-name="P7"><text:span text:style-name="T3">side = float(input("Введите длину стороны квадрата: "))</text:span></text:p>
          <text:p text:style-name="P7"><text:span text:style-name="T3"/></text:p>
          <text:p text:style-name="P7"><text:span text:style-name="T3"># Вычисление площади</text:span></text:p>
          <text:p text:style-name="P7"><text:span text:style-name="T3">area = side * side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Площадь квадрата:", are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ы сторон прямоугольника. Вывести на экр" draw:style-name="dp1" draw:master-page-name="Title_20_and_20_Content" presentation:presentation-page-layout-name="AL2T11">
        <draw:frame draw:name="Shape 83" presentation:style-name="pr4" draw:text-style-name="P9" draw:layer="layout" svg:width="29.209cm" svg:height="3.528cm" svg:x="0cm" svg:y="1.5cm" presentation:class="title" presentation:user-transformed="true">
          <draw:text-box>
            <text:p text:style-name="P5"><text:span text:style-name="T2">Пользователь вводит длины сторон прямоугольника. Вывести на экран площадь прямоугольника.</text:span></text:p>
          </draw:text-box>
        </draw:frame>
        <draw:custom-shape draw:name="Shape 84" draw:style-name="gr3" draw:text-style-name="P8" draw:layer="layout" svg:width="9.999cm" svg:height="10.167cm" svg:x="1.5cm" svg:y="7cm">
          <text:p text:style-name="P7"><text:span text:style-name="T3"># Ввод длин сторон прямоугольника</text:span></text:p>
          <text:p text:style-name="P7"><text:span text:style-name="T3">a = float(input("Введите длину первой стороны: "))</text:span></text:p>
          <text:p text:style-name="P7"><text:span text:style-name="T3">b = float(input("Введите длину второй стороны: "))</text:span></text:p>
          <text:p text:style-name="P7"><text:span text:style-name="T3"/></text:p>
          <text:p text:style-name="P7"><text:span text:style-name="T3"># Вычисление площади</text:span></text:p>
          <text:p text:style-name="P7"><text:span text:style-name="T3">area = a * b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Площадь прямоугольника:", are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Вывести на экран их среднее ариф" draw:style-name="dp1" draw:master-page-name="Title_20_and_20_Content" presentation:presentation-page-layout-name="AL2T11">
        <draw:frame draw:name="Shape 86" presentation:style-name="pr4" draw:text-style-name="P11" draw:layer="layout" svg:width="29.209cm" svg:height="5.882cm" svg:x="1.176cm" svg:y="1.355cm" presentation:class="title" presentation:user-transformed="true">
          <draw:text-box>
            <text:p text:style-name="P10"><text:span text:style-name="T4">Пользователь вводит два числа. Вывести на экран их среднее арифметическое.</text:span></text:p>
          </draw:text-box>
        </draw:frame>
        <draw:custom-shape draw:name="Shape 87" draw:style-name="gr4" draw:text-style-name="P8" draw:layer="layout" svg:width="9.999cm" svg:height="10.167cm" svg:x="1.35cm" svg:y="8.354cm">
          <text:p text:style-name="P7"><text:span text:style-name="T3"># Ввод двух чисел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Вычисление среднего арифметического</text:span></text:p>
          <text:p text:style-name="P7"><text:span text:style-name="T3">average = (num1 + num2) / 2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реднее арифметическое:"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Вывести на экран их среднее геом" draw:style-name="dp1" draw:master-page-name="Title_20_and_20_Content" presentation:presentation-page-layout-name="AL2T11">
        <draw:frame draw:name="Shape 89" presentation:style-name="pr4" draw:text-style-name="P11" draw:layer="layout" svg:width="29.209cm" svg:height="5.227cm" svg:x="1.291cm" svg:y="0.5cm" presentation:class="title" presentation:user-transformed="true">
          <draw:text-box>
            <text:p text:style-name="P10"><text:span text:style-name="T4">Пользователь вводит два числа. Вывести на экран их среднее геометрическое.</text:span></text:p>
          </draw:text-box>
        </draw:frame>
        <draw:custom-shape draw:name="Shape 90" draw:style-name="gr5" draw:text-style-name="P8" draw:layer="layout" svg:width="9.999cm" svg:height="10.167cm" svg:x="2.5cm" svg:y="7cm">
          <text:p text:style-name="P7"><text:span text:style-name="T3"># Ввод двух чисел от пользователя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Вычисление среднего арифметического</text:span></text:p>
          <text:p text:style-name="P7"><text:span text:style-name="T3">average = (num1 + num2) / 2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реднее арифметическое:"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лины катетов прямоугольного треугольника. " draw:style-name="dp1" draw:master-page-name="Title_20_and_20_Content" presentation:presentation-page-layout-name="AL2T11">
        <draw:frame draw:name="Shape 92" presentation:style-name="pr4" draw:text-style-name="P12" draw:layer="layout" svg:width="29.209cm" svg:height="4.609cm" svg:x="2.328cm" svg:y="0.891cm" presentation:class="title" presentation:user-transformed="true">
          <draw:text-box>
            <text:p text:style-name="P10"><text:span text:style-name="T5">Пользователь вводит длины катетов прямоугольного треугольника. Вывести на экран его гипотенузу и площадь.</text:span></text:p>
          </draw:text-box>
        </draw:frame>
        <draw:custom-shape draw:name="Shape 93" draw:style-name="gr6" draw:text-style-name="P14" draw:layer="layout" svg:width="9.999cm" svg:height="11.691cm" svg:x="2.328cm" svg:y="6.5cm">
          <text:p text:style-name="P13"><text:span text:style-name="T6">import math</text:span></text:p>
          <text:p text:style-name="P13"><text:span text:style-name="T6"/></text:p>
          <text:p text:style-name="P13"><text:span text:style-name="T6"># Ввод длин катетов</text:span></text:p>
          <text:p text:style-name="P13"><text:span text:style-name="T6">a = float(input("Введите длину первого катета: "))</text:span></text:p>
          <text:p text:style-name="P13"><text:span text:style-name="T6">b = float(input("Введите длину второго катета: "))</text:span></text:p>
          <text:p text:style-name="P13"><text:span text:style-name="T6"/></text:p>
          <text:p text:style-name="P13"><text:span text:style-name="T6"># Вычисление гипотенузы по теореме Пифагора: c = sqrt(a^2 + b^2)</text:span></text:p>
          <text:p text:style-name="P13"><text:span text:style-name="T6">hypotenuse = math.sqrt(a**2 + b**2)</text:span></text:p>
          <text:p text:style-name="P13"><text:span text:style-name="T6"/></text:p>
          <text:p text:style-name="P13"><text:span text:style-name="T6"># Вычисление площади: S = (a * b) / 2</text:span></text:p>
          <text:p text:style-name="P13"><text:span text:style-name="T6">area = (a * b) / 2</text:span></text:p>
          <text:p text:style-name="P13"><text:span text:style-name="T6"/></text:p>
          <text:p text:style-name="P13"><text:span text:style-name="T6"># Вывод результатов</text:span></text:p>
          <text:p text:style-name="P13"><text:span text:style-name="T6">print(f"Гипотенуза: {hypotenuse}")</text:span></text:p>
          <text:p text:style-name="P13"><text:span text:style-name="T6">print(f"Площадь: {area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число N. Вывести на экран через запятую (N-" draw:style-name="dp1" draw:master-page-name="Title_20_and_20_Content" presentation:presentation-page-layout-name="AL2T11">
        <draw:frame draw:name="Shape 95" presentation:style-name="pr4" draw:text-style-name="P11" draw:layer="layout" svg:width="29.209cm" svg:height="6.929cm" svg:x="2cm" svg:y="0.071cm" presentation:class="title" presentation:user-transformed="true">
          <draw:text-box>
            <text:p text:style-name="P10"><text:span text:style-name="T4">Пользователь вводит число N. Вывести на экран через запятую (N-1)</text:span><text:span text:style-name="T7">2</text:span><text:span text:style-name="T4">, N</text:span><text:span text:style-name="T7">2</text:span><text:span text:style-name="T4">, (N+1)</text:span><text:span text:style-name="T7">2</text:span></text:p>
          </draw:text-box>
        </draw:frame>
        <draw:custom-shape draw:name="Shape 96" draw:style-name="gr7" draw:text-style-name="P8" draw:layer="layout" svg:width="9.999cm" svg:height="7.881cm" svg:x="2.001cm" svg:y="7.119cm">
          <text:p text:style-name="P7"><text:span text:style-name="T3"># Ввод числа N</text:span></text:p>
          <text:p text:style-name="P7"><text:span text:style-name="T3">n = int(input("Введите число N: "))</text:span></text:p>
          <text:p text:style-name="P7"><text:span text:style-name="T3"/></text:p>
          <text:p text:style-name="P7"><text:span text:style-name="T3"># Вычисление квадратов</text:span></text:p>
          <text:p text:style-name="P7"><text:span text:style-name="T3">val1 = (n - 1) ** 2</text:span></text:p>
          <text:p text:style-name="P7"><text:span text:style-name="T3">val2 = n ** 2</text:span></text:p>
          <text:p text:style-name="P7"><text:span text:style-name="T3">val3 = (n + 1) ** 2</text:span></text:p>
          <text:p text:style-name="P7"><text:span text:style-name="T3"/></text:p>
          <text:p text:style-name="P7"><text:span text:style-name="T3"># Вывод через запятую</text:span></text:p>
          <text:p text:style-name="P7"><text:span text:style-name="T3">print(f"{val1}, {val2}, {val3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год. Вывести на экран ответ, является ли го" draw:style-name="dp1" draw:master-page-name="Title_20_and_20_Content" presentation:presentation-page-layout-name="AL2T11">
        <draw:frame draw:name="Shape 98" presentation:style-name="pr4" draw:text-style-name="P11" draw:layer="layout" svg:width="29.209cm" svg:height="6.458cm" svg:x="1.5cm" svg:y="0.042cm" presentation:class="title" presentation:user-transformed="true">
          <draw:text-box>
            <text:p text:style-name="P10"><text:span text:style-name="T4">Пользователь вводит год. Вывести на экран ответ, является ли год високосным.</text:span></text:p>
          </draw:text-box>
        </draw:frame>
        <draw:custom-shape draw:name="Shape 99" draw:style-name="gr8" draw:text-style-name="P8" draw:layer="layout" svg:width="9.999cm" svg:height="7.119cm" svg:x="2cm" svg:y="7cm">
          <text:p text:style-name="P7"><text:span text:style-name="T3"># Ввод года</text:span></text:p>
          <text:p text:style-name="P7"><text:span text:style-name="T3">year = int(input("Введите год: "))</text:span></text:p>
          <text:p text:style-name="P7"><text:span text:style-name="T3"/></text:p>
          <text:p text:style-name="P7"><text:span text:style-name="T3"># Проверка на високосный год</text:span></text:p>
          <text:p text:style-name="P7"><text:span text:style-name="T3">if (year % 4 == 0 and year % 100 != 0) or (year % 400 == 0):</text:span></text:p>
          <text:p text:style-name="P7"><text:span text:style-name="T3"><text:s text:c="4"/></text:span><text:span text:style-name="T3">print("Год високосный")</text:span></text:p>
          <text:p text:style-name="P7"><text:span text:style-name="T3">else:</text:span></text:p>
          <text:p text:style-name="P7"><text:span text:style-name="T3"><text:s text:c="4"/></text:span><text:span text:style-name="T3">print("Год не високосный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целое число. Программа должна ответить, чет" draw:style-name="dp1" draw:master-page-name="Title_20_and_20_Content" presentation:presentation-page-layout-name="AL2T11">
        <draw:frame draw:name="Shape 101" presentation:style-name="pr4" draw:text-style-name="P11" draw:layer="layout" svg:width="29.209cm" svg:height="7.158cm" svg:x="1.333cm" svg:y="0.864cm" presentation:class="title" presentation:user-transformed="true">
          <draw:text-box>
            <text:p text:style-name="P10"><text:span text:style-name="T4">Пользователь вводит целое число. Программа должна ответить, четным или нечетным является это число.</text:span></text:p>
          </draw:text-box>
        </draw:frame>
        <draw:custom-shape draw:name="Shape 102" draw:style-name="gr9" draw:text-style-name="P8" draw:layer="layout" svg:width="9.999cm" svg:height="8.643cm" svg:x="1.586cm" svg:y="9.035cm">
          <text:p text:style-name="P7"><text:span text:style-name="T3"># Ввод целого числа</text:span></text:p>
          <text:p text:style-name="P7"><text:span text:style-name="T3">number = int(input("Введите целое число: "))</text:span></text:p>
          <text:p text:style-name="P7"><text:span text:style-name="T3"/></text:p>
          <text:p text:style-name="P7"><text:span text:style-name="T3"># Проверка на четность с помощью оператора остатка от деления (%)</text:span></text:p>
          <text:p text:style-name="P7"><text:span text:style-name="T3">if number % 2 == 0:</text:span></text:p>
          <text:p text:style-name="P7"><text:span text:style-name="T3"><text:s text:c="4"/></text:span><text:span text:style-name="T3">print("Число четное")</text:span></text:p>
          <text:p text:style-name="P7"><text:span text:style-name="T3">else:</text:span></text:p>
          <text:p text:style-name="P7"><text:span text:style-name="T3"><text:s text:c="4"/></text:span><text:span text:style-name="T3">print("Число нечетное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два числа. Если первое число меньше второго" draw:style-name="dp1" draw:master-page-name="Title_20_and_20_Content" presentation:presentation-page-layout-name="AL2T11">
        <draw:frame draw:name="Shape 104" presentation:style-name="pr4" draw:text-style-name="P9" draw:layer="layout" svg:width="29.209cm" svg:height="4.5cm" svg:x="0cm" svg:y="-1cm" presentation:class="title" presentation:user-transformed="true">
          <draw:text-box>
            <text:p text:style-name="P10"><text:span text:style-name="T8">Пользователь вводит два числа. Если первое число меньше второго, то вычислить их сумму, иначе – разность первого и второго.</text:span></text:p>
          </draw:text-box>
        </draw:frame>
        <draw:custom-shape draw:name="Shape 105" draw:style-name="gr10" draw:text-style-name="P8" draw:layer="layout" svg:width="9.999cm" svg:height="15.501cm" svg:x="1.5cm" svg:y="3cm">
          <text:p text:style-name="P7"><text:span text:style-name="T3"># Ввод двух чисел</text:span></text:p>
          <text:p text:style-name="P7"><text:span text:style-name="T3">num1 = float(input("Введите первое число: "))</text:span></text:p>
          <text:p text:style-name="P7"><text:span text:style-name="T3">num2 = float(input("Введите второе число: "))</text:span></text:p>
          <text:p text:style-name="P7"><text:span text:style-name="T3"/></text:p>
          <text:p text:style-name="P7"><text:span text:style-name="T3"># Проверка условия</text:span></text:p>
          <text:p text:style-name="P7"><text:span text:style-name="T3">if num1 &lt; num2:</text:span></text:p>
          <text:p text:style-name="P7"><text:span text:style-name="T3"><text:s text:c="4"/></text:span><text:span text:style-name="T3"># Если первое меньше второго, вычисляем сумму</text:span></text:p>
          <text:p text:style-name="P7"><text:span text:style-name="T3"><text:s text:c="4"/></text:span><text:span text:style-name="T3">result = num1 + num2</text:span></text:p>
          <text:p text:style-name="P7"><text:span text:style-name="T3"><text:s text:c="4"/></text:span><text:span text:style-name="T3">print(f"Первое число меньше второго. Сумма: {result}")</text:span></text:p>
          <text:p text:style-name="P7"><text:span text:style-name="T3">else:</text:span></text:p>
          <text:p text:style-name="P7"><text:span text:style-name="T3"><text:s text:c="4"/></text:span><text:span text:style-name="T3"># Иначе (если первое больше или равно второму) вычисляем разность</text:span></text:p>
          <text:p text:style-name="P7"><text:span text:style-name="T3"><text:s text:c="4"/></text:span><text:span text:style-name="T3">result = num1 - num2</text:span></text:p>
          <text:p text:style-name="P7"><text:span text:style-name="T3"><text:s text:c="4"/></text:span><text:span text:style-name="T3">print(f"Первое число не меньше второго. Разность: {result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спечатать первые 16 степеней числа 2." draw:style-name="dp1" draw:master-page-name="Title_20_and_20_Content" presentation:presentation-page-layout-name="AL2T11">
        <draw:frame draw:name="Shape 107" presentation:style-name="pr4" draw:text-style-name="P11" draw:layer="layout" svg:width="29.209cm" svg:height="6.065cm" svg:x="2.328cm" svg:y="1.014cm" presentation:class="title" presentation:user-transformed="true">
          <draw:text-box>
            <text:p text:style-name="P10"><text:span text:style-name="T4">Распечатать первые 16 степеней числа 2.</text:span></text:p>
          </draw:text-box>
        </draw:frame>
        <draw:custom-shape draw:name="Shape 108" draw:style-name="gr11" draw:text-style-name="P8" draw:layer="layout" svg:width="9.999cm" svg:height="3.309cm" svg:x="2.001cm" svg:y="7.191cm">
          <text:p text:style-name="P7"><text:span text:style-name="T3">print("Первые 16 степеней числа 2:")</text:span></text:p>
          <text:p text:style-name="P7"><text:span text:style-name="T3">for i in range(16):</text:span></text:p>
          <text:p text:style-name="P7"><text:span text:style-name="T3"><text:s text:c="4"/></text:span><text:span text:style-name="T3">print(f"2^{i} = {2 ** i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Подсчитать, сколько среди н" draw:style-name="dp1" draw:master-page-name="Title_20_and_20_Content" presentation:presentation-page-layout-name="AL2T11">
        <draw:frame draw:name="Shape 110" presentation:style-name="pr4" draw:text-style-name="P11" draw:layer="layout" svg:width="29.209cm" svg:height="4.598cm" svg:x="2.328cm" svg:y="1.014cm" presentation:class="title" presentation:user-transformed="true">
          <draw:text-box>
            <text:p text:style-name="P10"><text:span text:style-name="T4">Пользователь вводит 10 целых чисел. Подсчитать, сколько среди них четных чисел.</text:span></text:p>
          </draw:text-box>
        </draw:frame>
        <draw:custom-shape draw:name="Shape 111" draw:style-name="gr12" draw:text-style-name="P8" draw:layer="layout" svg:width="9.999cm" svg:height="9.405cm" svg:x="2.607cm" svg:y="6.939cm">
          <text:p text:style-name="P7"><text:span text:style-name="T3">count_even = 0 <text:s/># Счетчик четных чисел</text:span></text:p>
          <text:p text:style-name="P7"><text:span text:style-name="T3"/></text:p>
          <text:p text:style-name="P7"><text:span text:style-name="T3">print("Введите 10 целых чисел:")</text:span></text:p>
          <text:p text:style-name="P7"><text:span text:style-name="T3"/></text:p>
          <text:p text:style-name="P7"><text:span text:style-name="T3">for i in range(10):</text:span></text:p>
          <text:p text:style-name="P7"><text:span text:style-name="T3"><text:s text:c="4"/></text:span><text:span text:style-name="T3">num = int(input(f"Число {i + 1}: "))</text:span></text:p>
          <text:p text:style-name="P7"><text:span text:style-name="T3"><text:s text:c="4"/></text:span><text:span text:style-name="T3">if num % 2 == 0:</text:span></text:p>
          <text:p text:style-name="P7"><text:span text:style-name="T3"><text:s text:c="8"/></text:span><text:span text:style-name="T3">count_even += 1</text:span></text:p>
          <text:p text:style-name="P7"><text:span text:style-name="T3"/></text:p>
          <text:p text:style-name="P7"><text:span text:style-name="T3">print(f"Количество четных чисел: {count_even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Подсчитать, сколько среди н (2)" draw:style-name="dp1" draw:master-page-name="Title_20_and_20_Content" presentation:presentation-page-layout-name="AL2T11">
        <draw:frame draw:name="Shape 113" presentation:style-name="pr4" draw:text-style-name="P9" draw:layer="layout" svg:width="29.209cm" svg:height="3.456cm" svg:x="0cm" svg:y="0.044cm" presentation:class="title" presentation:user-transformed="true">
          <draw:text-box>
            <text:p text:style-name="P10"><text:span text:style-name="T8">Пользователь вводит 10 целых чисел. Подсчитать, сколько среди них положительных, сколько отрицательных и сколько нулей.</text:span></text:p>
          </draw:text-box>
        </draw:frame>
        <draw:custom-shape draw:name="Shape 114" draw:style-name="gr13" draw:text-style-name="P16" draw:layer="layout" svg:width="9.999cm" svg:height="15.832cm" svg:x="0.5cm" svg:y="3cm">
          <text:p text:style-name="P15"><text:span text:style-name="T9"># Инициализация счетчиков</text:span></text:p>
          <text:p text:style-name="P15"><text:span text:style-name="T9">positive_count = 0</text:span></text:p>
          <text:p text:style-name="P15"><text:span text:style-name="T9">negative_count = 0</text:span></text:p>
          <text:p text:style-name="P15"><text:span text:style-name="T9">zero_count = 0</text:span></text:p>
          <text:p text:style-name="P15"><text:span text:style-name="T9"/></text:p>
          <text:p text:style-name="P15"><text:span text:style-name="T9">print("Введите 10 целых чисел:")</text:span></text:p>
          <text:p text:style-name="P15"><text:span text:style-name="T9"/></text:p>
          <text:p text:style-name="P15"><text:span text:style-name="T9">for i in range(10):</text:span></text:p>
          <text:p text:style-name="P15"><text:span text:style-name="T9"><text:s text:c="4"/></text:span><text:span text:style-name="T9">num = int(input(f"Число {i + 1}: "))</text:span></text:p>
          <text:p text:style-name="P15"><text:span text:style-name="T9"><text:s text:c="4"/></text:span></text:p>
          <text:p text:style-name="P15"><text:span text:style-name="T9"><text:s text:c="4"/></text:span><text:span text:style-name="T9">if num &gt; 0:</text:span></text:p>
          <text:p text:style-name="P15"><text:span text:style-name="T9"><text:s text:c="8"/></text:span><text:span text:style-name="T9">positive_count += 1</text:span></text:p>
          <text:p text:style-name="P15"><text:span text:style-name="T9"><text:s text:c="4"/></text:span><text:span text:style-name="T9">elif num &lt; 0:</text:span></text:p>
          <text:p text:style-name="P15"><text:span text:style-name="T9"><text:s text:c="8"/></text:span><text:span text:style-name="T9">negative_count += 1</text:span></text:p>
          <text:p text:style-name="P15"><text:span text:style-name="T9"><text:s text:c="4"/></text:span><text:span text:style-name="T9">else:</text:span></text:p>
          <text:p text:style-name="P15"><text:span text:style-name="T9"><text:s text:c="8"/></text:span><text:span text:style-name="T9">zero_count += 1</text:span></text:p>
          <text:p text:style-name="P15"><text:span text:style-name="T9"/></text:p>
          <text:p text:style-name="P15"><text:span text:style-name="T9"># Вывод результатов</text:span></text:p>
          <text:p text:style-name="P15"><text:span text:style-name="T9">print(f"Положительных чисел: {positive_count}")</text:span></text:p>
          <text:p text:style-name="P15"><text:span text:style-name="T9">print(f"Отрицательных чисел: {negative_count}")</text:span></text:p>
          <text:p text:style-name="P15"><text:span text:style-name="T9">print(f"Нулей: {zero_count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10 целых чисел. Найти разницу между наиболь" draw:style-name="dp1" draw:master-page-name="Title_20_and_20_Content" presentation:presentation-page-layout-name="AL2T11">
        <draw:frame draw:name="Shape 116" presentation:style-name="pr4" draw:text-style-name="P17" draw:layer="layout" svg:width="23.5cm" svg:height="6.982cm" svg:x="0.5cm" svg:y="-0.982cm" presentation:class="title" presentation:user-transformed="true">
          <draw:text-box>
            <text:p text:style-name="P10"><text:span text:style-name="T10">Пользователь вводит 10 целых чисел. Найти разницу между наибольшим и наименьшим.</text:span></text:p>
          </draw:text-box>
        </draw:frame>
        <draw:custom-shape draw:name="Shape 117" draw:style-name="gr14" draw:text-style-name="P19" draw:layer="layout" svg:width="9.999cm" svg:height="14.485cm" svg:x="1.5cm" svg:y="4.5cm">
          <text:p text:style-name="P18"><text:span text:style-name="T11"># Инициализация переменных для хранения максимума и минимума</text:span></text:p>
          <text:p text:style-name="P18"><text:span text:style-name="T11"># Используем None, чтобы правильно обработать первое введенное число</text:span></text:p>
          <text:p text:style-name="P18"><text:span text:style-name="T11">max_num = None</text:span></text:p>
          <text:p text:style-name="P18"><text:span text:style-name="T11">min_num = None</text:span></text:p>
          <text:p text:style-name="P18"><text:span text:style-name="T11"/></text:p>
          <text:p text:style-name="P18"><text:span text:style-name="T11">print("Введите 10 целых чисел:")</text:span></text:p>
          <text:p text:style-name="P18"><text:span text:style-name="T11"/></text:p>
          <text:p text:style-name="P18"><text:span text:style-name="T11">for i in range(10):</text:span></text:p>
          <text:p text:style-name="P18"><text:span text:style-name="T11"><text:s text:c="4"/></text:span><text:span text:style-name="T11">num = int(input(f"Число {i + 1}: "))</text:span></text:p>
          <text:p text:style-name="P18"><text:span text:style-name="T11"><text:s text:c="4"/></text:span></text:p>
          <text:p text:style-name="P18"><text:span text:style-name="T11"><text:s text:c="4"/></text:span><text:span text:style-name="T11"># Для первого числа устанавливаем и максимум, и минимум равными ему</text:span></text:p>
          <text:p text:style-name="P18"><text:span text:style-name="T11"><text:s text:c="4"/></text:span><text:span text:style-name="T11">if max_num is None or num &gt; max_num:</text:span></text:p>
          <text:p text:style-name="P18"><text:span text:style-name="T11"><text:s text:c="8"/></text:span><text:span text:style-name="T11">max_num = num</text:span></text:p>
          <text:p text:style-name="P18"><text:span text:style-name="T11"><text:s text:c="8"/></text:span></text:p>
          <text:p text:style-name="P18"><text:span text:style-name="T11"><text:s text:c="4"/></text:span><text:span text:style-name="T11">if min_num is None or num &lt; min_num:</text:span></text:p>
          <text:p text:style-name="P18"><text:span text:style-name="T11"><text:s text:c="8"/></text:span><text:span text:style-name="T11">min_num = num</text:span></text:p>
          <text:p text:style-name="P18"><text:span text:style-name="T11"/></text:p>
          <text:p text:style-name="P18"><text:span text:style-name="T11"># Вычисление разницы</text:span></text:p>
          <text:p text:style-name="P18"><text:span text:style-name="T11">difference = max_num - min_num</text:span></text:p>
          <text:p text:style-name="P18"><text:span text:style-name="T11"/></text:p>
          <text:p text:style-name="P18"><text:span text:style-name="T11"># Вывод результатов</text:span></text:p>
          <text:p text:style-name="P18"><text:span text:style-name="T11">print(f"Наибольшее число: {max_num}")</text:span></text:p>
          <text:p text:style-name="P18"><text:span text:style-name="T11">print(f"Наименьшее число: {min_num}")</text:span></text:p>
          <text:p text:style-name="P18"><text:span text:style-name="T11">print(f"Разница между наибольшим и наименьшим: {difference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массив А из 10 целых чисел. Подсчитать коли" draw:style-name="dp1" draw:master-page-name="Title_20_and_20_Content" presentation:presentation-page-layout-name="AL2T11">
        <draw:custom-shape draw:name="Shape 120" draw:style-name="gr15" draw:text-style-name="P21" draw:layer="layout" svg:width="9.999cm" svg:height="15.679cm" svg:x="1cm" svg:y="3cm">
          <text:p text:style-name="P20"><text:span text:style-name="T12"># Создаем пустой список для хранения чисел</text:span></text:p>
          <text:p text:style-name="P20"><text:span text:style-name="T12">A = []</text:span></text:p>
          <text:p text:style-name="P20"><text:span text:style-name="T12"/></text:p>
          <text:p text:style-name="P20"><text:span text:style-name="T12">print("Введите 10 целых чисел:")</text:span></text:p>
          <text:p text:style-name="P20"><text:span text:style-name="T12">for i in range(10):</text:span></text:p>
          <text:p text:style-name="P20"><text:span text:style-name="T12"><text:s text:c="4"/></text:span><text:span text:style-name="T12">num = int(input(f"Число {i + 1}: "))</text:span></text:p>
          <text:p text:style-name="P20"><text:span text:style-name="T12"><text:s text:c="4"/></text:span><text:span text:style-name="T12">A.append(num)</text:span></text:p>
          <text:p text:style-name="P20"><text:span text:style-name="T12"/></text:p>
          <text:p text:style-name="P20"><text:span text:style-name="T12"># Находим максимальный элемент в массиве</text:span></text:p>
          <text:p text:style-name="P20"><text:span text:style-name="T12">max_element = max(A)</text:span></text:p>
          <text:p text:style-name="P20"><text:span text:style-name="T12"/></text:p>
          <text:p text:style-name="P20"><text:span text:style-name="T12"># Подсчитываем количество элементов, равных максимальному</text:span></text:p>
          <text:p text:style-name="P20"><text:span text:style-name="T12">count_max = 0</text:span></text:p>
          <text:p text:style-name="P20"><text:span text:style-name="T12">for num in A:</text:span></text:p>
          <text:p text:style-name="P20"><text:span text:style-name="T12"><text:s text:c="4"/></text:span><text:span text:style-name="T12">if num == max_element:</text:span></text:p>
          <text:p text:style-name="P20"><text:span text:style-name="T12"><text:s text:c="8"/></text:span><text:span text:style-name="T12">count_max += 1</text:span></text:p>
          <text:p text:style-name="P20"><text:span text:style-name="T12"/></text:p>
          <text:p text:style-name="P20"><text:span text:style-name="T12"># Вывод результата</text:span></text:p>
          <text:p text:style-name="P20"><text:span text:style-name="T12">print(f"Массив: {A}")</text:span></text:p>
          <text:p text:style-name="P20"><text:span text:style-name="T12">print(f"Максимальный элемент: {max_element}")</text:span></text:p>
          <text:p text:style-name="P20"><text:span text:style-name="T12">print(f"Количество чисел, равных максимальному: {count_max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2" draw:layer="layout" svg:width="32.59cm" svg:height="7.5cm" svg:x="1cm" svg:y="0cm">
          <draw:text-box>
            <text:p><text:span text:style-name="T13">Пользователь вводит массив А из 10 целых чисел. Подсчитать количество чисел, равных максимальному элементу массив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массив А из 10 целых чисел. Подсчитать разн" draw:style-name="dp1" draw:master-page-name="Title_20_and_20_Content" presentation:presentation-page-layout-name="AL2T11">
        <draw:frame draw:name="Shape 122" presentation:style-name="pr4" draw:text-style-name="P9" draw:layer="layout" svg:width="24cm" svg:height="4.362cm" svg:x="0cm" svg:y="0cm" presentation:class="title" presentation:user-transformed="true">
          <draw:text-box>
            <text:p text:style-name="P10"><text:span text:style-name="T8">Пользователь вводит массив А из 10 целых чисел. Подсчитать разницу между суммой всех элементов с четными индексами и суммой всех элементов с нечетными индексами.</text:span></text:p>
          </draw:text-box>
        </draw:frame>
        <draw:custom-shape draw:name="Shape 123" draw:style-name="gr17" draw:text-style-name="P19" draw:layer="layout" svg:width="9.999cm" svg:height="15.501cm" svg:x="0.501cm" svg:y="3.549cm">
          <text:p text:style-name="P18"><text:span text:style-name="T11"># Инициализация списка и переменных для сумм</text:span></text:p>
          <text:p text:style-name="P18"><text:span text:style-name="T11">A = []</text:span></text:p>
          <text:p text:style-name="P18"><text:span text:style-name="T11">sum_even_indices = 0 <text:s/># Сумма элементов с четными индексами (0, 2, 4...)</text:span></text:p>
          <text:p text:style-name="P18"><text:span text:style-name="T11">sum_odd_indices = 0 <text:s text:c="2"/># Сумма элементов с нечетными индексами (1, 3, 5...)</text:span></text:p>
          <text:p text:style-name="P18"><text:span text:style-name="T11"/></text:p>
          <text:p text:style-name="P18"><text:span text:style-name="T11">print("Введите 10 целых чисел:")</text:span></text:p>
          <text:p text:style-name="P18"><text:span text:style-name="T11"/></text:p>
          <text:p text:style-name="P18"><text:span text:style-name="T11">for i in range(10):</text:span></text:p>
          <text:p text:style-name="P18"><text:span text:style-name="T11"><text:s text:c="4"/></text:span><text:span text:style-name="T11">num = int(input(f"Элемент с индексом {i}: "))</text:span></text:p>
          <text:p text:style-name="P18"><text:span text:style-name="T11"><text:s text:c="4"/></text:span><text:span text:style-name="T11">A.append(num)</text:span></text:p>
          <text:p text:style-name="P18"><text:span text:style-name="T11"><text:s text:c="4"/></text:span></text:p>
          <text:p text:style-name="P18"><text:span text:style-name="T11"><text:s text:c="4"/></text:span><text:span text:style-name="T11"># Проверяем четность индекса</text:span></text:p>
          <text:p text:style-name="P18"><text:span text:style-name="T11"><text:s text:c="4"/></text:span><text:span text:style-name="T11">if i % 2 == 0:</text:span></text:p>
          <text:p text:style-name="P18"><text:span text:style-name="T11"><text:s text:c="8"/></text:span><text:span text:style-name="T11">sum_even_indices += num</text:span></text:p>
          <text:p text:style-name="P18"><text:span text:style-name="T11"><text:s text:c="4"/></text:span><text:span text:style-name="T11">else:</text:span></text:p>
          <text:p text:style-name="P18"><text:span text:style-name="T11"><text:s text:c="8"/></text:span><text:span text:style-name="T11">sum_odd_indices += num</text:span></text:p>
          <text:p text:style-name="P18"><text:span text:style-name="T11"/></text:p>
          <text:p text:style-name="P18"><text:span text:style-name="T11"># Вычисляем разницу</text:span></text:p>
          <text:p text:style-name="P18"><text:span text:style-name="T11">difference = sum_even_indices - sum_odd_indices</text:span></text:p>
          <text:p text:style-name="P18"><text:span text:style-name="T11"/></text:p>
          <text:p text:style-name="P18"><text:span text:style-name="T11"># Вывод результатов</text:span></text:p>
          <text:p text:style-name="P18"><text:span text:style-name="T11">print(f"Массив: {A}")</text:span></text:p>
          <text:p text:style-name="P18"><text:span text:style-name="T11">print(f"Сумма элементов с четными индексами: {sum_even_indices}")</text:span></text:p>
          <text:p text:style-name="P18"><text:span text:style-name="T11">print(f"Сумма элементов с нечетными индексами: {sum_odd_indices}")</text:span></text:p>
          <text:p text:style-name="P18"><text:span text:style-name="T11">print(f"Разница (четные индексы - нечетные индексы): {difference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считать количество арабских цифр в тексте, введенном пользов" draw:style-name="dp1" draw:master-page-name="Title_20_and_20_Content" presentation:presentation-page-layout-name="AL2T11">
        <draw:frame draw:name="Shape 125" presentation:style-name="pr4" draw:text-style-name="P23" draw:layer="layout" svg:width="29.209cm" svg:height="2.5cm" svg:x="-0.209cm" svg:y="0cm" presentation:class="title" presentation:user-transformed="true">
          <draw:text-box>
            <text:p text:style-name="P10"><text:span text:style-name="T8">Подсчитать количество арабских цифр в тексте, введенном пользователем с клавиатуры.</text:span></text:p>
          </draw:text-box>
        </draw:frame>
        <draw:custom-shape draw:name="Shape 126" draw:style-name="gr18" draw:text-style-name="P8" draw:layer="layout" svg:width="9.999cm" svg:height="13.215cm" svg:x="0.5cm" svg:y="2.5cm">
          <text:p text:style-name="P7"><text:span text:style-name="T3"># Ввод текста от пользователя</text:span></text:p>
          <text:p text:style-name="P7"><text:span text:style-name="T3">text = input("Введите текст: ")</text:span></text:p>
          <text:p text:style-name="P7"><text:span text:style-name="T3"/></text:p>
          <text:p text:style-name="P7"><text:span text:style-name="T3"># Инициализация счетчика</text:span></text:p>
          <text:p text:style-name="P7"><text:span text:style-name="T3">count_digits = 0</text:span></text:p>
          <text:p text:style-name="P7"><text:span text:style-name="T3"/></text:p>
          <text:p text:style-name="P7"><text:span text:style-name="T3"># Проходим по каждому символу в тексте</text:span></text:p>
          <text:p text:style-name="P7"><text:span text:style-name="T3">for char in text:</text:span></text:p>
          <text:p text:style-name="P7"><text:span text:style-name="T3"><text:s text:c="4"/></text:span><text:span text:style-name="T3"># Проверка, является ли символ цифрой</text:span></text:p>
          <text:p text:style-name="P7"><text:span text:style-name="T3"><text:s text:c="4"/></text:span><text:span text:style-name="T3">if char.isdigit():</text:span></text:p>
          <text:p text:style-name="P7"><text:span text:style-name="T3"><text:s text:c="8"/></text:span><text:span text:style-name="T3">count_digits += 1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f"Количество арабских цифр в тексте: {count_digits}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брать из строки, введенной пользователем все пробелы, и распеч" draw:style-name="dp1" draw:master-page-name="Title_20_and_20_Content" presentation:presentation-page-layout-name="AL2T11">
        <draw:frame draw:name="Shape 128" presentation:style-name="pr4" draw:text-style-name="P24" draw:layer="layout" svg:width="29.209cm" svg:height="3cm" svg:x="0cm" svg:y="0cm" presentation:class="title" presentation:user-transformed="true">
          <draw:text-box>
            <text:p text:style-name="P10"><text:span text:style-name="T13">Убрать из строки, введенной пользователем все пробелы, и распечатать ее.</text:span></text:p>
          </draw:text-box>
        </draw:frame>
        <draw:custom-shape draw:name="Shape 129" draw:style-name="gr19" draw:text-style-name="P8" draw:layer="layout" svg:width="9.999cm" svg:height="10.167cm" svg:x="1cm" svg:y="5cm">
          <text:p text:style-name="P7"><text:span text:style-name="T3"># Ввод строки от пользователя</text:span></text:p>
          <text:p text:style-name="P7"><text:span text:style-name="T3">text = input("Введите строку: ")</text:span></text:p>
          <text:p text:style-name="P7"><text:span text:style-name="T3"/></text:p>
          <text:p text:style-name="P7"><text:span text:style-name="T3"># Удаление всех пробелов</text:span></text:p>
          <text:p text:style-name="P7"><text:span text:style-name="T3"># Метод replace заменяет все вхождения первого аргумента на второй</text:span></text:p>
          <text:p text:style-name="P7"><text:span text:style-name="T3">text_without_spaces = text.replace(" ", "")</text:span></text:p>
          <text:p text:style-name="P7"><text:span text:style-name="T3"/></text:p>
          <text:p text:style-name="P7"><text:span text:style-name="T3"># Вывод результата</text:span></text:p>
          <text:p text:style-name="P7"><text:span text:style-name="T3">print("Строка без пробелов:", text_without_spac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спечатать первое слово из строки, введенной пользователем с к" draw:style-name="dp1" draw:master-page-name="Title_20_and_20_Content" presentation:presentation-page-layout-name="AL2T11">
        <draw:frame draw:name="Shape 131" presentation:style-name="pr4" draw:text-style-name="P25" draw:layer="layout" svg:width="27.5cm" svg:height="5.5cm" svg:x="0cm" svg:y="0cm" presentation:class="title" presentation:user-transformed="true">
          <draw:text-box>
            <text:p text:style-name="P10"><text:span text:style-name="T14">Распечатать первое слово из строки, введенной пользователем с клавиатуры.</text:span></text:p>
          </draw:text-box>
        </draw:frame>
        <draw:custom-shape draw:name="Shape 132" draw:style-name="gr20" draw:text-style-name="P8" draw:layer="layout" svg:width="9.999cm" svg:height="13.215cm" svg:x="1cm" svg:y="5.5cm">
          <text:p text:style-name="P7"><text:span text:style-name="T3"># Ввод строки от пользователя</text:span></text:p>
          <text:p text:style-name="P7"><text:span text:style-name="T3">text = input("Введите строку: ")</text:span></text:p>
          <text:p text:style-name="P7"><text:span text:style-name="T3"/></text:p>
          <text:p text:style-name="P7"><text:span text:style-name="T3"># Разбиваем строку на слова. </text:span></text:p>
          <text:p text:style-name="P7"><text:span text:style-name="T3"># split() без аргументов автоматически игнорирует несколько пробелов, табуляции и переводы строк</text:span></text:p>
          <text:p text:style-name="P7"><text:span text:style-name="T3">words = text.split()</text:span></text:p>
          <text:p text:style-name="P7"><text:span text:style-name="T3"/></text:p>
          <text:p text:style-name="P7"><text:span text:style-name="T3"># Проверяем, есть ли слова в строке (защита от пустого ввода)</text:span></text:p>
          <text:p text:style-name="P7"><text:span text:style-name="T3">if words:</text:span></text:p>
          <text:p text:style-name="P7"><text:span text:style-name="T3"><text:s text:c="4"/></text:span><text:span text:style-name="T3">print("Первое слово:", words[0])</text:span></text:p>
          <text:p text:style-name="P7"><text:span text:style-name="T3">else:</text:span></text:p>
          <text:p text:style-name="P7"><text:span text:style-name="T3"><text:s text:c="4"/></text:span><text:span text:style-name="T3">print("Вы не ввели ни одного слова.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ьзователь вводит с клавиатуры текст. Записать его в файл." draw:style-name="dp1" draw:master-page-name="Title_20_and_20_Content" presentation:presentation-page-layout-name="AL2T11">
        <draw:frame draw:name="Shape 134" presentation:style-name="pr4" draw:text-style-name="P11" draw:layer="layout" svg:width="29.209cm" svg:height="6.013cm" svg:x="0cm" svg:y="0cm" presentation:class="title" presentation:user-transformed="true">
          <draw:text-box>
            <text:p text:style-name="P10"><text:span text:style-name="T4">Пользователь вводит с клавиатуры текст. Записать его в файл.</text:span></text:p>
          </draw:text-box>
        </draw:frame>
        <draw:custom-shape draw:name="Shape 135" draw:style-name="gr21" draw:text-style-name="P14" draw:layer="layout" svg:width="9.999cm" svg:height="12.961cm" svg:x="1.001cm" svg:y="5.5cm">
          <text:p text:style-name="P13"><text:span text:style-name="T6"># Ввод текста от пользователя</text:span></text:p>
          <text:p text:style-name="P13"><text:span text:style-name="T6">text = input("Введите текст для записи в файл: ")</text:span></text:p>
          <text:p text:style-name="P13"><text:span text:style-name="T6"/></text:p>
          <text:p text:style-name="P13"><text:span text:style-name="T6"># Имя файла</text:span></text:p>
          <text:p text:style-name="P13"><text:span text:style-name="T6">filename = "output.txt"</text:span></text:p>
          <text:p text:style-name="P13"><text:span text:style-name="T6"/></text:p>
          <text:p text:style-name="P13"><text:span text:style-name="T6"># Запись текста в файл</text:span></text:p>
          <text:p text:style-name="P13"><text:span text:style-name="T6"># 'w' (write) означает режим записи. Если файла нет, он создастся.</text:span></text:p>
          <text:p text:style-name="P13"><text:span text:style-name="T6"># Если файл есть, его содержимое будет перезаписано.</text:span></text:p>
          <text:p text:style-name="P13"><text:span text:style-name="T6"># encoding='utf-8' нужен для корректной работы с русским языком</text:span></text:p>
          <text:p text:style-name="P13"><text:span text:style-name="T6">with open(filename, 'w', encoding='utf-8') as file:</text:span></text:p>
          <text:p text:style-name="P13"><text:span text:style-name="T6"><text:s text:c="4"/></text:span><text:span text:style-name="T6">file.write(text)</text:span></text:p>
          <text:p text:style-name="P13"><text:span text:style-name="T6"/></text:p>
          <text:p text:style-name="P13"><text:span text:style-name="T6">print(f"Текст успешно записан в файл '{filename}'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исать программу для следующей игры человека с компьютером. Ч" draw:style-name="dp1" draw:master-page-name="Title_20_and_20_Content" presentation:presentation-page-layout-name="AL2T11">
        <draw:custom-shape draw:name="Shape 138" draw:style-name="gr22" draw:text-style-name="P8" draw:layer="layout" svg:width="24.905cm" svg:height="38.36cm" svg:x="0.486cm" svg:y="-9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6" draw:layer="layout" svg:width="34.309cm" svg:height="3.536cm" svg:x="0cm" svg:y="-0.036cm">
          <draw:text-box>
            <text:p><text:span text:style-name="T15">Написать программу для следующей игры человека с компьютером. Человек загадывает некоторое число из диапазона </text:span><text:span text:style-name="T16">[N,M]</text:span><text:span text:style-name="T15">, а компьютер должен отгадать это число за минимальное количество вопросов типа »да-нет» (Ваше число больше 25? Ваше число меньше 70? И т.д.)</text:span></text:p>
          </draw:text-box>
        </draw:frame>
        <draw:frame draw:style-name="gr24" draw:text-style-name="P27" draw:layer="layout" svg:width="5.5cm" svg:height="17cm" svg:x="7.5cm" svg:y="2.5cm">
          <draw:text-box>
            <text:p><text:span text:style-name="T17">import math</text:span></text:p>
            <text:p><text:span text:style-name="T17"/></text:p>
            <text:p><text:span text:style-name="T17">def guess_number_game():</text:span></text:p>
            <text:p><text:span text:style-name="T17"><text:s text:c="4"/></text:span><text:span text:style-name="T17"># 1. Ввод диапазона</text:span></text:p>
            <text:p><text:span text:style-name="T17"><text:s text:c="4"/></text:span><text:span text:style-name="T17">try:</text:span></text:p>
            <text:p><text:span text:style-name="T17"><text:s text:c="8"/></text:span><text:span text:style-name="T17">N = int(input("Введите начало диапазона N: "))</text:span></text:p>
            <text:p><text:span text:style-name="T17"><text:s text:c="8"/></text:span><text:span text:style-name="T17">M = int(input("Введите конец диапазона M: "))</text:span></text:p>
            <text:p><text:span text:style-name="T17"><text:s text:c="4"/></text:span><text:span text:style-name="T17">except ValueError:</text:span></text:p>
            <text:p><text:span text:style-name="T17"><text:s text:c="8"/></text:span><text:span text:style-name="T17">print("❌ Ошибка: введите целые числа.")</text:span></text:p>
            <text:p><text:span text:style-name="T17"><text:s text:c="8"/></text:span><text:span text:style-name="T17">return</text:span></text:p>
            <text:p><text:span text:style-name="T17"/></text:p>
            <text:p><text:span text:style-name="T17"><text:s text:c="4"/></text:span><text:span text:style-name="T17">if N &gt; M:</text:span></text:p>
            <text:p><text:span text:style-name="T17"><text:s text:c="8"/></text:span><text:span text:style-name="T17">print("❌ Ошибка: N не может быть больше M.")</text:span></text:p>
            <text:p><text:span text:style-name="T17"><text:s text:c="8"/></text:span><text:span text:style-name="T17">return</text:span></text:p>
            <text:p><text:span text:style-name="T17"/></text:p>
            <text:p><text:span text:style-name="T17"><text:s text:c="4"/></text:span><text:span text:style-name="T17">low, high = N, M</text:span></text:p>
            <text:p><text:span text:style-name="T17"><text:s text:c="4"/></text:span><text:span text:style-name="T17">attempts = 0</text:span></text:p>
            <text:p><text:span text:style-name="T17"><text:s text:c="4"/></text:span><text:span text:style-name="T17"># Теоретический минимум вопросов для этого диапазона</text:span></text:p>
            <text:p><text:span text:style-name="T17"><text:s text:c="4"/></text:span><text:span text:style-name="T17">min_possible = math.ceil(math.log2(high - low + 1))</text:span></text:p>
            <text:p><text:span text:style-name="T17"/></text:p>
            <text:p><text:span text:style-name="T17"><text:s text:c="4"/></text:span><text:span text:style-name="T17">print(f"\n🔮 Загадайте целое число от {N} до {M} (включительно).")</text:span></text:p>
            <text:p><text:span text:style-name="T17"><text:s text:c="4"/></text:span><text:span text:style-name="T17">print("На вопросы отвечайте символами: <text:s/>'&gt;' (больше), '&lt;' (меньше) или '=' (угадал)")</text:span></text:p>
            <text:p><text:span text:style-name="T17"><text:s text:c="4"/></text:span><text:span text:style-name="T17">print("-" * 50)</text:span></text:p>
            <text:p><text:span text:style-name="T17"/></text:p>
            <text:p><text:span text:style-name="T17"><text:s text:c="4"/></text:span><text:span text:style-name="T17"># 2. Основной цикл угадывания (бинарный поиск)</text:span></text:p>
            <text:p><text:span text:style-name="T17"><text:s text:c="4"/></text:span><text:span text:style-name="T17">while low &lt;= high:</text:span></text:p>
            <text:p><text:span text:style-name="T17"><text:s text:c="8"/></text:span><text:span text:style-name="T17">mid = (low + high) // 2</text:span></text:p>
            <text:p><text:span text:style-name="T17"><text:s text:c="8"/></text:span><text:span text:style-name="T17">attempts += 1</text:span></text:p>
            <text:p><text:span text:style-name="T17"/></text:p>
            <text:p><text:span text:style-name="T17"><text:s text:c="8"/></text:span><text:span text:style-name="T17"># Формируем вопрос</text:span></text:p>
            <text:p><text:span text:style-name="T17"><text:s text:c="8"/></text:span><text:span text:style-name="T17">answer = input(f"Вопрос №{attempts}: Ваше число больше, меньше или равно {mid}? (&gt; &lt; =): ").strip()</text:span></text:p>
            <text:p><text:span text:style-name="T17"/></text:p>
            <text:p><text:span text:style-name="T17"><text:s text:c="8"/></text:span><text:span text:style-name="T17">if answer == '=':</text:span></text:p>
            <text:p><text:span text:style-name="T17"><text:s text:c="12"/></text:span><text:span text:style-name="T17">print(f"\n✅ Я угадал! Ваше число: {mid}")</text:span></text:p>
            <text:p><text:span text:style-name="T17"><text:s text:c="12"/></text:span><text:span text:style-name="T17">print(f"📊 Количество вопросов: {attempts} (теоретический минимум: {min_possible})")</text:span></text:p>
            <text:p><text:span text:style-name="T17"><text:s text:c="12"/></text:span><text:span text:style-name="T17">return</text:span></text:p>
            <text:p><text:span text:style-name="T17"><text:s text:c="8"/></text:span><text:span text:style-name="T17">elif answer == '&gt;':</text:span></text:p>
            <text:p><text:span text:style-name="T17"><text:s text:c="12"/></text:span><text:span text:style-name="T17">low = mid + 1 <text:s text:c="5"/># Число в правой половине</text:span></text:p>
            <text:p><text:span text:style-name="T17"><text:s text:c="8"/></text:span><text:span text:style-name="T17">elif answer == '&lt;':</text:span></text:p>
            <text:p><text:span text:style-name="T17"><text:s text:c="12"/></text:span><text:span text:style-name="T17">high = mid - 1 <text:s text:c="4"/># Число в левой половине</text:span></text:p>
            <text:p><text:span text:style-name="T17"><text:s text:c="8"/></text:span><text:span text:style-name="T17">else:</text:span></text:p>
            <text:p><text:span text:style-name="T17"><text:s text:c="12"/></text:span><text:span text:style-name="T17">print("⚠️ Неверный ввод. Пожалуйста, используйте только &gt;, &lt; или =.")</text:span></text:p>
            <text:p><text:span text:style-name="T17"><text:s text:c="12"/></text:span><text:span text:style-name="T17">attempts -= 1 <text:s text:c="5"/># Не считаем ошибочный ввод</text:span></text:p>
            <text:p><text:span text:style-name="T17"><text:s text:c="12"/></text:span><text:span text:style-name="T17">continue</text:span></text:p>
            <text:p><text:span text:style-name="T17"/></text:p>
            <text:p><text:span text:style-name="T17"><text:s text:c="8"/></text:span><text:span text:style-name="T17"># Защита от противоречивых ответов пользователя</text:span></text:p>
            <text:p><text:span text:style-name="T17"><text:s text:c="8"/></text:span><text:span text:style-name="T17">if low &gt; high:</text:span></text:p>
            <text:p><text:span text:style-name="T17"><text:s text:c="12"/></text:span><text:span text:style-name="T17">print("\n❌ Ошибка: ваши ответы логически противоречивы. Число не найдено.")</text:span></text:p>
            <text:p><text:span text:style-name="T17"><text:s text:c="12"/></text:span><text:span text:style-name="T17">return</text:span></text:p>
            <text:p><text:span text:style-name="T17"/></text:p>
            <text:p><text:span text:style-name="T17">if __name__ == "__main__":</text:span></text:p>
            <text:p><text:span text:style-name="T17"><text:s text:c="4"/></text:span><text:span text:style-name="T17">guess_number_game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Mono" svg:font-family="'Liberation Mono', 'Courier New', Cousine, 'DejaVu Sans Mono'" style:font-family-generic="modern" style:font-pitch="variable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family="'Calibri Light'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family="'Calibri Light'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90%" fo:text-align="star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/>
    </style:style>
    <style:style style:name="MP14" style:family="paragraph">
      <style:paragraph-properties fo:margin-left="0cm" fo:margin-right="0cm" fo:margin-top="0.176cm" fo:margin-bottom="0cm" fo:line-height="90%" fo:text-align="start" fo:text-indent="0cm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Shape 33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Shape 35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Shape 36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hape 37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Shape 49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Shape 50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1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Shape 52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hape 53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20:11:14</meta:creation-date>
    <dc:date>2026-05-18T14:11:40.890102717</dc:date>
    <meta:editing-duration>PT1H56M6S</meta:editing-duration>
    <meta:generator>LibreOffice/7.6.7.2$Linux_X86_64 LibreOffice_project/60$Build-2</meta:generator>
    <meta:editing-cycles>4</meta:editing-cycles>
    <meta:document-statistic meta:object-count="117"/>
    <meta:template xlink:type="simple" xlink:actuate="onRequest" xlink:title="Normal.dotm" xlink:href=""/>
  </office:meta>
</office:document-meta>
</file>