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Mono" svg:font-family="'Liberation Mono', 'Courier New', Cousine, 'DejaVu Sans Mono'" style:font-family-generic="modern" style:font-pitch="variable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11cm" fo:min-width="15.184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5.2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882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85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3.125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3.846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2.24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9.362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0.802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7.2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0.622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4.474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3.28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6.75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6.768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8pt" style:font-size-asian="18pt" style:font-size-complex="18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color="#c9211e" loext:opacity="100%" style:font-name="Liberation Mono1" fo:font-size="18pt" style:font-name-asian="Liberation Mono1" style:font-size-asian="18pt" style:font-name-complex="Liberation Mono1" style:font-size-complex="18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</style:style>
    <style:style style:name="P14" style:family="paragraph">
      <style:paragraph-properties fo:margin-top="0cm" fo:margin-bottom="0cm" fo:line-height="90%" fo:text-align="star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top="0cm" fo:margin-bottom="0cm" fo:line-height="90%"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8" style:family="paragraph">
      <style:paragraph-properties fo:margin-top="0cm" fo:margin-bottom="0cm" fo:line-height="100%" fo:text-align="start"/>
      <style:text-properties fo:font-size="15pt" style:font-size-asian="15pt" style:font-size-complex="15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20" style:family="paragraph">
      <style:paragraph-properties fo:margin-top="0cm" fo:margin-bottom="0cm" fo:line-height="100%" fo:text-align="start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pt" style:font-size-asian="16pt" style:font-size-complex="16pt"/>
    </style:style>
    <style:style style:name="P22" style:family="paragraph">
      <style:paragraph-properties fo:margin-top="0cm" fo:margin-bottom="0cm" fo:line-height="90%" fo:text-align="start"/>
      <style:text-properties fo:font-size="32pt" style:font-size-asian="32pt" style:font-size-complex="32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4" style:family="paragraph"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29" style:family="paragraph">
      <style:text-properties fo:font-size="26pt" style:font-size-asian="26pt" style:font-size-complex="26pt"/>
    </style:style>
    <style:style style:name="P30" style:family="paragraph">
      <loext:graphic-properties draw:fill="none"/>
      <style:text-properties fo:font-size="26pt" style:font-size-asian="26pt" style:font-size-complex="26pt"/>
    </style:style>
    <style:style style:name="P31" style:family="paragraph">
      <loext:graphic-properties draw:fill="none"/>
      <style:paragraph-properties fo:text-align="start"/>
      <style:text-properties fo:color="#c9211e" loext:opacity="100%" style:font-name="Liberation Mono1" fo:font-size="14pt" style:font-name-asian="Liberation Mono1" style:font-size-asian="14pt" style:font-name-complex="Liberation Mono1" style:font-size-complex="14pt"/>
    </style:style>
    <style:style style:name="P32" style:family="paragraph">
      <style:paragraph-properties fo:margin-top="0cm" fo:margin-bottom="0cm" fo:line-height="90%" fo:text-align="start"/>
      <style:text-properties fo:font-weight="normal" style:font-weight-asian="normal" style:font-weight-complex="normal"/>
    </style:style>
    <style:style style:name="P33" style:family="paragraph">
      <loext:graphic-properties draw:fill="none"/>
      <style:paragraph-properties fo:text-align="start" style:font-independent-line-spacing="true"/>
      <style:text-properties fo:font-size="20pt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start"/>
      <style:text-properties fo:color="#c9211e" loext:opacity="100%" style:font-name="Liberation Mono1" fo:font-size="16pt" style:font-name-asian="Liberation Mono1" style:font-size-asian="16pt" style:font-name-complex="Liberation Mono1" style:font-size-complex="16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6" style:family="paragraph">
      <loext:graphic-properties draw:fill="none"/>
      <style:paragraph-properties fo:text-align="start" style:font-independent-line-spacing="true"/>
      <style:text-properties fo:font-size="42pt" style:font-size-asian="42pt" style:font-size-complex="42pt"/>
    </style:style>
    <style:style style:name="P37" style:family="paragraph">
      <style:text-properties fo:font-size="6pt" style:font-size-asian="6pt" style:font-size-complex="6pt"/>
    </style:style>
    <style:style style:name="P38" style:family="paragraph">
      <loext:graphic-properties draw:fill="none"/>
      <style:text-properties fo:font-size="6pt" style:font-size-asian="6pt" style:font-size-complex="6pt"/>
    </style:style>
    <style:style style:name="P39" style:family="paragraph">
      <style:paragraph-properties fo:text-align="start"/>
      <style:text-properties fo:color="#c9211e" loext:opacity="100%" style:font-name="Liberation Mono1" fo:font-size="10pt" style:font-name-asian="Liberation Mono1" style:font-size-asian="10pt" style:font-name-complex="Liberation Mono1" style:font-size-complex="10pt"/>
    </style:style>
    <style:style style:name="P40" style:family="paragraph">
      <loext:graphic-properties draw:fill="none"/>
      <style:paragraph-properties fo:text-align="start"/>
      <style:text-properties fo:color="#c9211e" loext:opacity="100%"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c9211e" loext:opacity="100%" style:font-name="Liberation Mono1" fo:font-size="18pt" style:font-name-asian="Liberation Mono1" style:font-size-asian="18pt" style:font-name-complex="Liberation Mono1" style:font-size-complex="18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c9211e" loext:opacity="100%" style:font-name="Liberation Mono1" fo:font-size="24pt" style:font-name-asian="Liberation Mono1" style:font-size-asian="24pt" style:font-name-complex="Liberation Mono1" style:font-size-complex="24pt"/>
    </style:style>
    <style:style style:name="T10" style:family="text">
      <style:text-properties fo:color="#c9211e" loext:opacity="100%" style:font-name="Liberation Mono1" fo:font-size="26pt" style:font-name-asian="Liberation Mono1" style:font-size-asian="26pt" style:font-name-complex="Liberation Mono1" style:font-size-complex="2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c9211e" loext:opacity="100%" style:font-name="Liberation Mono1" fo:font-size="14pt" style:font-name-asian="Liberation Mono1" style:font-size-asian="14pt" style:font-name-complex="Liberation Mono1" style:font-size-complex="14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color="#c9211e" loext:opacity="100%" style:font-name="Liberation Mono1" fo:font-size="16pt" style:font-name-asian="Liberation Mono1" style:font-size-asian="16pt" style:font-name-complex="Liberation Mono1" style:font-size-complex="16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2pt" fo:letter-spacing="normal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Программирование" draw:style-name="dp1" draw:master-page-name="Title" presentation:presentation-page-layout-name="AL1T0">
        <draw:frame draw:name="Shape 77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Программирование</text:span></text:p>
          </draw:text-box>
        </draw:frame>
        <draw:frame draw:name="Shape 78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лину стороны квадрата. Вывести на экран пл" draw:style-name="dp1" draw:master-page-name="Title_20_and_20_Content" presentation:presentation-page-layout-name="AL2T11">
        <draw:frame draw:name="Shape 80" presentation:style-name="pr4" draw:text-style-name="P6" draw:layer="layout" svg:width="26.176cm" svg:height="4.465cm" draw:transform="rotate (-0.00174532925199447) translate (0.008cm 0.489cm)" presentation:class="title" presentation:user-transformed="true">
          <draw:text-box>
            <text:p text:style-name="P5"><text:span text:style-name="T2">Пользователь вводит длину стороны квадрата. Вывести на экран площадь квадрата.</text:span></text:p>
          </draw:text-box>
        </draw:frame>
        <draw:custom-shape draw:name="Shape 81" draw:style-name="gr2" draw:text-style-name="P8" draw:layer="layout" svg:width="15.683cm" svg:height="8.369cm" svg:x="0.5cm" svg:y="6.131cm">
          <text:p text:style-name="P7"><text:span text:style-name="T3"># Ввод длины стороны квадрата</text:span></text:p>
          <text:p text:style-name="P7"><text:span text:style-name="T3">side = float(input("Введите длину стороны квадрата: "))</text:span></text:p>
          <text:p text:style-name="P7"><text:span text:style-name="T3"/></text:p>
          <text:p text:style-name="P7"><text:span text:style-name="T3"># Вычисление площади</text:span></text:p>
          <text:p text:style-name="P7"><text:span text:style-name="T3">area = side * side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Площадь квадрата:", are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14cm" svg:height="5.5cm" svg:x="19cm" svg:y="8cm">
          <draw:text-box>
            <text:p text:style-name="P9"><text:span text:style-name="T4">Введите длину стороны квадрата: <text:s/>10</text:span></text:p>
            <text:p text:style-name="P9"><text:span text:style-name="T4">Площадь квадрата: 100.0</text:span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лины сторон прямоугольника. Вывести на экр" draw:style-name="dp1" draw:master-page-name="Title_20_and_20_Content" presentation:presentation-page-layout-name="AL2T11">
        <draw:frame draw:name="Shape 83" presentation:style-name="pr4" draw:text-style-name="P12" draw:layer="layout" svg:width="29.209cm" svg:height="3.528cm" svg:x="0cm" svg:y="1.5cm" presentation:class="title" presentation:user-transformed="true">
          <draw:text-box>
            <text:p text:style-name="P11"><text:span text:style-name="T2">Пользователь вводит длины сторон прямоугольника. Вывести на экран площадь прямоугольника.</text:span></text:p>
          </draw:text-box>
        </draw:frame>
        <draw:custom-shape draw:name="Shape 84" draw:style-name="gr4" draw:text-style-name="P8" draw:layer="layout" svg:width="9.999cm" svg:height="10.167cm" svg:x="1.5cm" svg:y="7cm">
          <text:p text:style-name="P7"><text:span text:style-name="T3"># Ввод длин сторон прямоугольника</text:span></text:p>
          <text:p text:style-name="P7"><text:span text:style-name="T3">a = float(input("Введите длину первой стороны: "))</text:span></text:p>
          <text:p text:style-name="P7"><text:span text:style-name="T3">b = float(input("Введите длину второй стороны: "))</text:span></text:p>
          <text:p text:style-name="P7"><text:span text:style-name="T3"/></text:p>
          <text:p text:style-name="P7"><text:span text:style-name="T3"># Вычисление площади</text:span></text:p>
          <text:p text:style-name="P7"><text:span text:style-name="T3">area = a * b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Площадь прямоугольника:", are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3.075cm" svg:height="3.132cm" svg:x="18.425cm" svg:y="8.5cm">
          <draw:text-box>
            <text:p><text:span text:style-name="T4">Введите длину первой стороны: <text:s/>5</text:span></text:p>
            <text:p><text:span text:style-name="T4">Введите длину второй стороны: <text:s/>17</text:span></text:p>
            <text:p><text:span text:style-name="T4">Площадь прямоугольника: 85.0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ва числа. Вывести на экран их среднее ариф" draw:style-name="dp1" draw:master-page-name="Title_20_and_20_Content" presentation:presentation-page-layout-name="AL2T11">
        <draw:frame draw:name="Shape 86" presentation:style-name="pr4" draw:text-style-name="P15" draw:layer="layout" svg:width="29.209cm" svg:height="5.882cm" svg:x="1.176cm" svg:y="1.355cm" presentation:class="title" presentation:user-transformed="true">
          <draw:text-box>
            <text:p text:style-name="P14"><text:span text:style-name="T5">Пользователь вводит два числа. Вывести на экран их среднее арифметическое.</text:span></text:p>
          </draw:text-box>
        </draw:frame>
        <draw:custom-shape draw:name="Shape 87" draw:style-name="gr6" draw:text-style-name="P8" draw:layer="layout" svg:width="9.999cm" svg:height="10.167cm" svg:x="1.35cm" svg:y="8.354cm">
          <text:p text:style-name="P7"><text:span text:style-name="T3"># Ввод двух чисел</text:span></text:p>
          <text:p text:style-name="P7"><text:span text:style-name="T3">num1 = float(input("Введите первое число: "))</text:span></text:p>
          <text:p text:style-name="P7"><text:span text:style-name="T3">num2 = float(input("Введите второе число: "))</text:span></text:p>
          <text:p text:style-name="P7"><text:span text:style-name="T3"/></text:p>
          <text:p text:style-name="P7"><text:span text:style-name="T3"># Вычисление среднего арифметического</text:span></text:p>
          <text:p text:style-name="P7"><text:span text:style-name="T3">average = (num1 + num2) / 2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Среднее арифметическое:"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1.17cm" svg:height="3.132cm" svg:x="17.83cm" svg:y="8.868cm">
          <draw:text-box>
            <text:p><text:span text:style-name="T4">Введите первое число: <text:s/>56</text:span></text:p>
            <text:p><text:span text:style-name="T4">Введите второе число: <text:s/>72</text:span></text:p>
            <text:p><text:span text:style-name="T4">Среднее арифметическое: 64.0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ва числа. Вывести на экран их среднее геом" draw:style-name="dp1" draw:master-page-name="Title_20_and_20_Content" presentation:presentation-page-layout-name="AL2T11">
        <draw:frame draw:name="Shape 89" presentation:style-name="pr4" draw:text-style-name="P15" draw:layer="layout" svg:width="29.209cm" svg:height="5.227cm" svg:x="1.291cm" svg:y="0.5cm" presentation:class="title" presentation:user-transformed="true">
          <draw:text-box>
            <text:p text:style-name="P14"><text:span text:style-name="T5">Пользователь вводит два числа. Вывести на экран их среднее геометрическое.</text:span></text:p>
          </draw:text-box>
        </draw:frame>
        <draw:custom-shape draw:name="Shape 90" draw:style-name="gr7" draw:text-style-name="P8" draw:layer="layout" svg:width="9.999cm" svg:height="10.167cm" svg:x="2.5cm" svg:y="7cm">
          <text:p text:style-name="P7"><text:span text:style-name="T3"># Ввод двух чисел от пользователя</text:span></text:p>
          <text:p text:style-name="P7"><text:span text:style-name="T3">num1 = float(input("Введите первое число: "))</text:span></text:p>
          <text:p text:style-name="P7"><text:span text:style-name="T3">num2 = float(input("Введите второе число: "))</text:span></text:p>
          <text:p text:style-name="P7"><text:span text:style-name="T3"/></text:p>
          <text:p text:style-name="P7"><text:span text:style-name="T3"># Вычисление среднего арифметического</text:span></text:p>
          <text:p text:style-name="P7"><text:span text:style-name="T3">average = (num1 + num2) / 2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Среднее арифметическое:"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6.123cm" svg:height="3.132cm" svg:x="15.877cm" svg:y="8.5cm">
          <draw:text-box>
            <text:p><text:span text:style-name="T4">Введите первое число: <text:s/>60</text:span></text:p>
            <text:p><text:span text:style-name="T4">Введите второе число: <text:s/>99</text:span></text:p>
            <text:p><text:span text:style-name="T4">Среднее геометрическое: 77.07139547199077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лины катетов прямоугольного треугольника. " draw:style-name="dp1" draw:master-page-name="Title_20_and_20_Content" presentation:presentation-page-layout-name="AL2T11">
        <draw:frame draw:name="Shape 92" presentation:style-name="pr4" draw:text-style-name="P17" draw:layer="layout" svg:width="29.209cm" svg:height="4.609cm" svg:x="2.328cm" svg:y="0.891cm" presentation:class="title" presentation:user-transformed="true">
          <draw:text-box>
            <text:p text:style-name="P16"><text:span text:style-name="T6">Пользователь вводит длины катетов прямоугольного треугольника. Вывести на экран его гипотенузу и площадь.</text:span></text:p>
          </draw:text-box>
        </draw:frame>
        <draw:custom-shape draw:name="Shape 93" draw:style-name="gr8" draw:text-style-name="P19" draw:layer="layout" svg:width="9.999cm" svg:height="11.691cm" svg:x="2.328cm" svg:y="6.5cm">
          <text:p text:style-name="P18"><text:span text:style-name="T7">import math</text:span></text:p>
          <text:p text:style-name="P18"><text:span text:style-name="T7"/></text:p>
          <text:p text:style-name="P18"><text:span text:style-name="T7"># Ввод длин катетов</text:span></text:p>
          <text:p text:style-name="P18"><text:span text:style-name="T7">a = float(input("Введите длину первого катета: "))</text:span></text:p>
          <text:p text:style-name="P18"><text:span text:style-name="T7">b = float(input("Введите длину второго катета: "))</text:span></text:p>
          <text:p text:style-name="P18"><text:span text:style-name="T7"/></text:p>
          <text:p text:style-name="P18"><text:span text:style-name="T7"># Вычисление гипотенузы по теореме Пифагора: c = sqrt(a^2 + b^2)</text:span></text:p>
          <text:p text:style-name="P18"><text:span text:style-name="T7">hypotenuse = math.sqrt(a**2 + b**2)</text:span></text:p>
          <text:p text:style-name="P18"><text:span text:style-name="T7"/></text:p>
          <text:p text:style-name="P18"><text:span text:style-name="T7"># Вычисление площади: S = (a * b) / 2</text:span></text:p>
          <text:p text:style-name="P18"><text:span text:style-name="T7">area = (a * b) / 2</text:span></text:p>
          <text:p text:style-name="P18"><text:span text:style-name="T7"/></text:p>
          <text:p text:style-name="P18"><text:span text:style-name="T7"># Вывод результатов</text:span></text:p>
          <text:p text:style-name="P18"><text:span text:style-name="T7">print(f"Гипотенуза: {hypotenuse}")</text:span></text:p>
          <text:p text:style-name="P18"><text:span text:style-name="T7">print(f"Площадь: {area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3.075cm" svg:height="3.852cm" svg:x="17.5cm" svg:y="10.648cm">
          <draw:text-box>
            <text:p><text:span text:style-name="T4">Введите длину первого катета: <text:s/>7</text:span></text:p>
            <text:p><text:span text:style-name="T4">Введите длину второго катета: <text:s/>10</text:span></text:p>
            <text:p><text:span text:style-name="T4">Гипотенуза: 12.206555615733702</text:span></text:p>
            <text:p><text:span text:style-name="T4">Площадь: 35.0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число N. Вывести на экран через запятую (N-" draw:style-name="dp1" draw:master-page-name="Title_20_and_20_Content" presentation:presentation-page-layout-name="AL2T11">
        <draw:frame draw:name="Shape 95" presentation:style-name="pr4" draw:text-style-name="P15" draw:layer="layout" svg:width="29.209cm" svg:height="6.929cm" svg:x="2cm" svg:y="0.071cm" presentation:class="title" presentation:user-transformed="true">
          <draw:text-box>
            <text:p text:style-name="P14"><text:span text:style-name="T5">Пользователь вводит число N. Вывести на экран через запятую (N-1)</text:span><text:span text:style-name="T8">2</text:span><text:span text:style-name="T5">, N</text:span><text:span text:style-name="T8">2</text:span><text:span text:style-name="T5">, (N+1)</text:span><text:span text:style-name="T8">2</text:span></text:p>
          </draw:text-box>
        </draw:frame>
        <draw:custom-shape draw:name="Shape 96" draw:style-name="gr10" draw:text-style-name="P8" draw:layer="layout" svg:width="9.999cm" svg:height="7.881cm" svg:x="2.001cm" svg:y="7.119cm">
          <text:p text:style-name="P7"><text:span text:style-name="T3"># Ввод числа N</text:span></text:p>
          <text:p text:style-name="P7"><text:span text:style-name="T3">n = int(input("Введите число N: "))</text:span></text:p>
          <text:p text:style-name="P7"><text:span text:style-name="T3"/></text:p>
          <text:p text:style-name="P7"><text:span text:style-name="T3"># Вычисление квадратов</text:span></text:p>
          <text:p text:style-name="P7"><text:span text:style-name="T3">val1 = (n - 1) ** 2</text:span></text:p>
          <text:p text:style-name="P7"><text:span text:style-name="T3">val2 = n ** 2</text:span></text:p>
          <text:p text:style-name="P7"><text:span text:style-name="T3">val3 = (n + 1) ** 2</text:span></text:p>
          <text:p text:style-name="P7"><text:span text:style-name="T3"/></text:p>
          <text:p text:style-name="P7"><text:span text:style-name="T3"># Вывод через запятую</text:span></text:p>
          <text:p text:style-name="P7"><text:span text:style-name="T3">print(f"{val1}, {val2}, {val3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10.662cm" svg:height="3.135cm" svg:x="19.338cm" svg:y="8.865cm">
          <draw:text-box>
            <text:p><text:span text:style-name="T9">Введите число N: <text:s/>19</text:span></text:p>
            <text:p><text:span text:style-name="T9">324, 361, 400</text:span></text:p>
            <text:p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год. Вывести на экран ответ, является ли го" draw:style-name="dp1" draw:master-page-name="Title_20_and_20_Content" presentation:presentation-page-layout-name="AL2T11">
        <draw:frame draw:name="Shape 98" presentation:style-name="pr4" draw:text-style-name="P15" draw:layer="layout" svg:width="29.209cm" svg:height="6.458cm" svg:x="1.5cm" svg:y="0.042cm" presentation:class="title" presentation:user-transformed="true">
          <draw:text-box>
            <text:p text:style-name="P14"><text:span text:style-name="T5">Пользователь вводит год. Вывести на экран ответ, является ли год високосным.</text:span></text:p>
          </draw:text-box>
        </draw:frame>
        <draw:custom-shape draw:name="Shape 99" draw:style-name="gr12" draw:text-style-name="P8" draw:layer="layout" svg:width="9.999cm" svg:height="7.119cm" svg:x="2cm" svg:y="7cm">
          <text:p text:style-name="P7"><text:span text:style-name="T3"># Ввод года</text:span></text:p>
          <text:p text:style-name="P7"><text:span text:style-name="T3">year = int(input("Введите год: "))</text:span></text:p>
          <text:p text:style-name="P7"><text:span text:style-name="T3"/></text:p>
          <text:p text:style-name="P7"><text:span text:style-name="T3"># Проверка на високосный год</text:span></text:p>
          <text:p text:style-name="P7"><text:span text:style-name="T3">if (year % 4 == 0 and year % 100 != 0) or (year % 400 == 0):</text:span></text:p>
          <text:p text:style-name="P7"><text:span text:style-name="T3"><text:s text:c="4"/></text:span><text:span text:style-name="T3">print("Год високосный")</text:span></text:p>
          <text:p text:style-name="P7"><text:span text:style-name="T3">else:</text:span></text:p>
          <text:p text:style-name="P7"><text:span text:style-name="T3"><text:s text:c="4"/></text:span><text:span text:style-name="T3">print("Год не високосный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10.408cm" svg:height="3.375cm" svg:x="20cm" svg:y="10cm">
          <draw:text-box>
            <text:p><text:span text:style-name="T10">Введите год: <text:s/>2026</text:span></text:p>
            <text:p><text:span text:style-name="T10">Год не високосный</text:span></text:p>
            <text:p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целое число. Программа должна ответить, чет" draw:style-name="dp1" draw:master-page-name="Title_20_and_20_Content" presentation:presentation-page-layout-name="AL2T11">
        <draw:frame draw:name="Shape 101" presentation:style-name="pr4" draw:text-style-name="P15" draw:layer="layout" svg:width="29.209cm" svg:height="7.158cm" svg:x="1.333cm" svg:y="0.864cm" presentation:class="title" presentation:user-transformed="true">
          <draw:text-box>
            <text:p text:style-name="P14"><text:span text:style-name="T5">Пользователь вводит целое число. Программа должна ответить, четным или нечетным является это число.</text:span></text:p>
          </draw:text-box>
        </draw:frame>
        <draw:custom-shape draw:name="Shape 102" draw:style-name="gr14" draw:text-style-name="P8" draw:layer="layout" svg:width="9.999cm" svg:height="8.643cm" svg:x="1.586cm" svg:y="9.035cm">
          <text:p text:style-name="P7"><text:span text:style-name="T3"># Ввод целого числа</text:span></text:p>
          <text:p text:style-name="P7"><text:span text:style-name="T3">number = int(input("Введите целое число: "))</text:span></text:p>
          <text:p text:style-name="P7"><text:span text:style-name="T3"/></text:p>
          <text:p text:style-name="P7"><text:span text:style-name="T3"># Проверка на четность с помощью оператора остатка от деления (%)</text:span></text:p>
          <text:p text:style-name="P7"><text:span text:style-name="T3">if number % 2 == 0:</text:span></text:p>
          <text:p text:style-name="P7"><text:span text:style-name="T3"><text:s text:c="4"/></text:span><text:span text:style-name="T3">print("Число четное")</text:span></text:p>
          <text:p text:style-name="P7"><text:span text:style-name="T3">else:</text:span></text:p>
          <text:p text:style-name="P7"><text:span text:style-name="T3"><text:s text:c="4"/></text:span><text:span text:style-name="T3">print("Число нечетное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13.16cm" svg:height="3.375cm" svg:x="17.34cm" svg:y="10cm">
          <draw:text-box>
            <text:p><text:span text:style-name="T10">Введите целое число: <text:s/>4</text:span></text:p>
            <text:p><text:span text:style-name="T10">Число четное</text:span></text:p>
            <text:p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ва числа. Если первое число меньше второго" draw:style-name="dp1" draw:master-page-name="Title_20_and_20_Content" presentation:presentation-page-layout-name="AL2T11">
        <draw:frame draw:name="Shape 104" presentation:style-name="pr4" draw:text-style-name="P12" draw:layer="layout" svg:width="29.209cm" svg:height="4.5cm" svg:x="0cm" svg:y="-1cm" presentation:class="title" presentation:user-transformed="true">
          <draw:text-box>
            <text:p text:style-name="P14"><text:span text:style-name="T11">Пользователь вводит два числа. Если первое число меньше второго, то вычислить их сумму, иначе – разность первого и второго.</text:span></text:p>
          </draw:text-box>
        </draw:frame>
        <draw:custom-shape draw:name="Shape 105" draw:style-name="gr15" draw:text-style-name="P8" draw:layer="layout" svg:width="9.999cm" svg:height="15.501cm" svg:x="1.5cm" svg:y="3cm">
          <text:p text:style-name="P7"><text:span text:style-name="T3"># Ввод двух чисел</text:span></text:p>
          <text:p text:style-name="P7"><text:span text:style-name="T3">num1 = float(input("Введите первое число: "))</text:span></text:p>
          <text:p text:style-name="P7"><text:span text:style-name="T3">num2 = float(input("Введите второе число: "))</text:span></text:p>
          <text:p text:style-name="P7"><text:span text:style-name="T3"/></text:p>
          <text:p text:style-name="P7"><text:span text:style-name="T3"># Проверка условия</text:span></text:p>
          <text:p text:style-name="P7"><text:span text:style-name="T3">if num1 &lt; num2:</text:span></text:p>
          <text:p text:style-name="P7"><text:span text:style-name="T3"><text:s text:c="4"/></text:span><text:span text:style-name="T3"># Если первое меньше второго, вычисляем сумму</text:span></text:p>
          <text:p text:style-name="P7"><text:span text:style-name="T3"><text:s text:c="4"/></text:span><text:span text:style-name="T3">result = num1 + num2</text:span></text:p>
          <text:p text:style-name="P7"><text:span text:style-name="T3"><text:s text:c="4"/></text:span><text:span text:style-name="T3">print(f"Первое число меньше второго. Сумма: {result}")</text:span></text:p>
          <text:p text:style-name="P7"><text:span text:style-name="T3">else:</text:span></text:p>
          <text:p text:style-name="P7"><text:span text:style-name="T3"><text:s text:c="4"/></text:span><text:span text:style-name="T3"># Иначе (если первое больше или равно второму) вычисляем разность</text:span></text:p>
          <text:p text:style-name="P7"><text:span text:style-name="T3"><text:s text:c="4"/></text:span><text:span text:style-name="T3">result = num1 - num2</text:span></text:p>
          <text:p text:style-name="P7"><text:span text:style-name="T3"><text:s text:c="4"/></text:span><text:span text:style-name="T3">print(f"Первое число не меньше второго. Разность: {result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3" draw:layer="layout" svg:width="21.33cm" svg:height="4.096cm" svg:x="12.17cm" svg:y="8.404cm">
          <draw:text-box>
            <text:p><text:span text:style-name="T9">Введите первое число: <text:s/>45</text:span></text:p>
            <text:p><text:span text:style-name="T9">Введите второе число: <text:s/>93</text:span></text:p>
            <text:p><text:span text:style-name="T9">Первое число меньше второго. Сумма: 138.0</text:span></text:p>
            <text:p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спечатать первые 16 степеней числа 2." draw:style-name="dp1" draw:master-page-name="Title_20_and_20_Content" presentation:presentation-page-layout-name="AL2T11">
        <draw:frame draw:name="Shape 107" presentation:style-name="pr4" draw:text-style-name="P15" draw:layer="layout" svg:width="29.209cm" svg:height="6.065cm" svg:x="2.328cm" svg:y="1.014cm" presentation:class="title" presentation:user-transformed="true">
          <draw:text-box>
            <text:p text:style-name="P14"><text:span text:style-name="T5">Распечатать первые 16 степеней числа 2.</text:span></text:p>
          </draw:text-box>
        </draw:frame>
        <draw:custom-shape draw:name="Shape 108" draw:style-name="gr17" draw:text-style-name="P8" draw:layer="layout" svg:width="9.999cm" svg:height="3.309cm" svg:x="2.001cm" svg:y="7.191cm">
          <text:p text:style-name="P7"><text:span text:style-name="T3">print("Первые 16 степеней числа 2:")</text:span></text:p>
          <text:p text:style-name="P7"><text:span text:style-name="T3">for i in range(16):</text:span></text:p>
          <text:p text:style-name="P7"><text:span text:style-name="T3"><text:s text:c="4"/></text:span><text:span text:style-name="T3">print(f"2^{i} = {2 ** i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3" draw:layer="layout" svg:width="10.789cm" svg:height="12.492cm" svg:x="19.711cm" svg:y="5cm">
          <draw:text-box>
            <text:p><text:span text:style-name="T4">Первые 16 степеней числа 2:</text:span></text:p>
            <text:p><text:span text:style-name="T4">2^0 = 1</text:span></text:p>
            <text:p><text:span text:style-name="T4">2^1 = 2</text:span></text:p>
            <text:p><text:span text:style-name="T4">2^2 = 4</text:span></text:p>
            <text:p><text:span text:style-name="T4">2^3 = 8</text:span></text:p>
            <text:p><text:span text:style-name="T4">2^4 = 16</text:span></text:p>
            <text:p><text:span text:style-name="T4">2^5 = 32</text:span></text:p>
            <text:p><text:span text:style-name="T4">2^6 = 64</text:span></text:p>
            <text:p><text:span text:style-name="T4">2^7 = 128</text:span></text:p>
            <text:p><text:span text:style-name="T4">2^8 = 256</text:span></text:p>
            <text:p><text:span text:style-name="T4">2^9 = 512</text:span></text:p>
            <text:p><text:span text:style-name="T4">2^10 = 1024</text:span></text:p>
            <text:p><text:span text:style-name="T4">2^11 = 2048</text:span></text:p>
            <text:p><text:span text:style-name="T4">2^12 = 4096</text:span></text:p>
            <text:p><text:span text:style-name="T4">2^13 = 8192</text:span></text:p>
            <text:p><text:span text:style-name="T4">2^14 = 16384</text:span></text:p>
            <text:p><text:span text:style-name="T4">2^15 = 3276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10 целых чисел. Подсчитать, сколько среди н" draw:style-name="dp1" draw:master-page-name="Title_20_and_20_Content" presentation:presentation-page-layout-name="AL2T11">
        <draw:frame draw:name="Shape 110" presentation:style-name="pr4" draw:text-style-name="P15" draw:layer="layout" svg:width="29.209cm" svg:height="4.598cm" svg:x="2.328cm" svg:y="1.014cm" presentation:class="title" presentation:user-transformed="true">
          <draw:text-box>
            <text:p text:style-name="P14"><text:span text:style-name="T5">Пользователь вводит 10 целых чисел. Подсчитать, сколько среди них четных чисел.</text:span></text:p>
          </draw:text-box>
        </draw:frame>
        <draw:custom-shape draw:name="Shape 111" draw:style-name="gr19" draw:text-style-name="P8" draw:layer="layout" svg:width="9.999cm" svg:height="9.405cm" svg:x="2.607cm" svg:y="6.939cm">
          <text:p text:style-name="P7"><text:span text:style-name="T3">count_even = 0 <text:s/># Счетчик четных чисел</text:span></text:p>
          <text:p text:style-name="P7"><text:span text:style-name="T3"/></text:p>
          <text:p text:style-name="P7"><text:span text:style-name="T3">print("Введите 10 целых чисел:")</text:span></text:p>
          <text:p text:style-name="P7"><text:span text:style-name="T3"/></text:p>
          <text:p text:style-name="P7"><text:span text:style-name="T3">for i in range(10):</text:span></text:p>
          <text:p text:style-name="P7"><text:span text:style-name="T3"><text:s text:c="4"/></text:span><text:span text:style-name="T3">num = int(input(f"Число {i + 1}: "))</text:span></text:p>
          <text:p text:style-name="P7"><text:span text:style-name="T3"><text:s text:c="4"/></text:span><text:span text:style-name="T3">if num % 2 == 0:</text:span></text:p>
          <text:p text:style-name="P7"><text:span text:style-name="T3"><text:s text:c="8"/></text:span><text:span text:style-name="T3">count_even += 1</text:span></text:p>
          <text:p text:style-name="P7"><text:span text:style-name="T3"/></text:p>
          <text:p text:style-name="P7"><text:span text:style-name="T3">print(f"Количество четных чисел: {count_even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3" draw:layer="layout" svg:width="10.408cm" svg:height="9.612cm" svg:x="20.5cm" svg:y="7.5cm">
          <draw:text-box>
            <text:p><text:span text:style-name="T4">Введите 10 целых чисел:</text:span></text:p>
            <text:p><text:span text:style-name="T4">Число 1: <text:s/>2</text:span></text:p>
            <text:p><text:span text:style-name="T4">Число 2: <text:s/>7</text:span></text:p>
            <text:p><text:span text:style-name="T4">Число 3: <text:s/>12</text:span></text:p>
            <text:p><text:span text:style-name="T4">Число 4: <text:s/>34</text:span></text:p>
            <text:p><text:span text:style-name="T4">Число 5: <text:s/>56</text:span></text:p>
            <text:p><text:span text:style-name="T4">Число 6: <text:s/>77</text:span></text:p>
            <text:p><text:span text:style-name="T4">Число 7: <text:s/>83</text:span></text:p>
            <text:p><text:span text:style-name="T4">Число 8: <text:s/>4</text:span></text:p>
            <text:p><text:span text:style-name="T4">Число 9: <text:s/>90</text:span></text:p>
            <text:p><text:span text:style-name="T4">Число 10: <text:s/>66</text:span></text:p>
            <text:p><text:span text:style-name="T4">Количество четных чисел: 7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10 целых чисел. Подсчитать, сколько среди н (2)" draw:style-name="dp1" draw:master-page-name="Title_20_and_20_Content" presentation:presentation-page-layout-name="AL2T11">
        <draw:frame draw:name="Shape 113" presentation:style-name="pr4" draw:text-style-name="P12" draw:layer="layout" svg:width="29.209cm" svg:height="3.456cm" svg:x="0cm" svg:y="0.044cm" presentation:class="title" presentation:user-transformed="true">
          <draw:text-box>
            <text:p text:style-name="P14"><text:span text:style-name="T11">Пользователь вводит 10 целых чисел. Подсчитать, сколько среди них положительных, сколько отрицательных и сколько нулей.</text:span></text:p>
          </draw:text-box>
        </draw:frame>
        <draw:custom-shape draw:name="Shape 114" draw:style-name="gr21" draw:text-style-name="P21" draw:layer="layout" svg:width="9.999cm" svg:height="15.832cm" svg:x="0.5cm" svg:y="3cm">
          <text:p text:style-name="P20"><text:span text:style-name="T12"># Инициализация счетчиков</text:span></text:p>
          <text:p text:style-name="P20"><text:span text:style-name="T12">positive_count = 0</text:span></text:p>
          <text:p text:style-name="P20"><text:span text:style-name="T12">negative_count = 0</text:span></text:p>
          <text:p text:style-name="P20"><text:span text:style-name="T12">zero_count = 0</text:span></text:p>
          <text:p text:style-name="P20"><text:span text:style-name="T12"/></text:p>
          <text:p text:style-name="P20"><text:span text:style-name="T12">print("Введите 10 целых чисел:")</text:span></text:p>
          <text:p text:style-name="P20"><text:span text:style-name="T12"/></text:p>
          <text:p text:style-name="P20"><text:span text:style-name="T12">for i in range(10):</text:span></text:p>
          <text:p text:style-name="P20"><text:span text:style-name="T12"><text:s text:c="4"/></text:span><text:span text:style-name="T12">num = int(input(f"Число {i + 1}: "))</text:span></text:p>
          <text:p text:style-name="P20"><text:span text:style-name="T12"><text:s text:c="4"/></text:span></text:p>
          <text:p text:style-name="P20"><text:span text:style-name="T12"><text:s text:c="4"/></text:span><text:span text:style-name="T12">if num &gt; 0:</text:span></text:p>
          <text:p text:style-name="P20"><text:span text:style-name="T12"><text:s text:c="8"/></text:span><text:span text:style-name="T12">positive_count += 1</text:span></text:p>
          <text:p text:style-name="P20"><text:span text:style-name="T12"><text:s text:c="4"/></text:span><text:span text:style-name="T12">elif num &lt; 0:</text:span></text:p>
          <text:p text:style-name="P20"><text:span text:style-name="T12"><text:s text:c="8"/></text:span><text:span text:style-name="T12">negative_count += 1</text:span></text:p>
          <text:p text:style-name="P20"><text:span text:style-name="T12"><text:s text:c="4"/></text:span><text:span text:style-name="T12">else:</text:span></text:p>
          <text:p text:style-name="P20"><text:span text:style-name="T12"><text:s text:c="8"/></text:span><text:span text:style-name="T12">zero_count += 1</text:span></text:p>
          <text:p text:style-name="P20"><text:span text:style-name="T12"/></text:p>
          <text:p text:style-name="P20"><text:span text:style-name="T12"># Вывод результатов</text:span></text:p>
          <text:p text:style-name="P20"><text:span text:style-name="T12">print(f"Положительных чисел: {positive_count}")</text:span></text:p>
          <text:p text:style-name="P20"><text:span text:style-name="T12">print(f"Отрицательных чисел: {negative_count}")</text:span></text:p>
          <text:p text:style-name="P20"><text:span text:style-name="T12">print(f"Нулей: {zero_count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3" draw:layer="layout" svg:width="9.265cm" svg:height="11.052cm" svg:x="19cm" svg:y="7.948cm">
          <draw:text-box>
            <text:p><text:span text:style-name="T4">Введите 10 целых чисел:</text:span></text:p>
            <text:p><text:span text:style-name="T4">Число 1: <text:s/>-12</text:span></text:p>
            <text:p><text:span text:style-name="T4">Число 2: <text:s/>-542</text:span></text:p>
            <text:p><text:span text:style-name="T4">Число 3: <text:s/>0</text:span></text:p>
            <text:p><text:span text:style-name="T4">Число 4: <text:s/>14</text:span></text:p>
            <text:p><text:span text:style-name="T4">Число 5: <text:s/>45</text:span></text:p>
            <text:p><text:span text:style-name="T4">Число 6: <text:s/>67</text:span></text:p>
            <text:p><text:span text:style-name="T4">Число 7: <text:s/>90</text:span></text:p>
            <text:p><text:span text:style-name="T4">Число 8: <text:s/>73</text:span></text:p>
            <text:p><text:span text:style-name="T4">Число 9: <text:s/>36</text:span></text:p>
            <text:p><text:span text:style-name="T4">Число 10: <text:s/>9</text:span></text:p>
            <text:p><text:span text:style-name="T4">Положительных чисел: 7</text:span></text:p>
            <text:p><text:span text:style-name="T4">Отрицательных чисел: 2</text:span></text:p>
            <text:p><text:span text:style-name="T4">Нулей: 1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10 целых чисел. Найти разницу между наиболь" draw:style-name="dp1" draw:master-page-name="Title_20_and_20_Content" presentation:presentation-page-layout-name="AL2T11">
        <draw:frame draw:name="Shape 116" presentation:style-name="pr4" draw:text-style-name="P23" draw:layer="layout" svg:width="23.5cm" svg:height="6.982cm" svg:x="0.5cm" svg:y="-0.982cm" presentation:class="title" presentation:user-transformed="true">
          <draw:text-box>
            <text:p text:style-name="P22"><text:span text:style-name="T13">Пользователь вводит 10 целых чисел. Найти разницу между наибольшим и наименьшим.</text:span></text:p>
          </draw:text-box>
        </draw:frame>
        <draw:custom-shape draw:name="Shape 117" draw:style-name="gr23" draw:text-style-name="P25" draw:layer="layout" svg:width="9.999cm" svg:height="14.485cm" svg:x="1.5cm" svg:y="4.5cm">
          <text:p text:style-name="P24"><text:span text:style-name="T14"># Инициализация переменных для хранения максимума и минимума</text:span></text:p>
          <text:p text:style-name="P24"><text:span text:style-name="T14"># Используем None, чтобы правильно обработать первое введенное число</text:span></text:p>
          <text:p text:style-name="P24"><text:span text:style-name="T14">max_num = None</text:span></text:p>
          <text:p text:style-name="P24"><text:span text:style-name="T14">min_num = None</text:span></text:p>
          <text:p text:style-name="P24"><text:span text:style-name="T14"/></text:p>
          <text:p text:style-name="P24"><text:span text:style-name="T14">print("Введите 10 целых чисел:")</text:span></text:p>
          <text:p text:style-name="P24"><text:span text:style-name="T14"/></text:p>
          <text:p text:style-name="P24"><text:span text:style-name="T14">for i in range(10):</text:span></text:p>
          <text:p text:style-name="P24"><text:span text:style-name="T14"><text:s text:c="4"/></text:span><text:span text:style-name="T14">num = int(input(f"Число {i + 1}: "))</text:span></text:p>
          <text:p text:style-name="P24"><text:span text:style-name="T14"><text:s text:c="4"/></text:span></text:p>
          <text:p text:style-name="P24"><text:span text:style-name="T14"><text:s text:c="4"/></text:span><text:span text:style-name="T14"># Для первого числа устанавливаем и максимум, и минимум равными ему</text:span></text:p>
          <text:p text:style-name="P24"><text:span text:style-name="T14"><text:s text:c="4"/></text:span><text:span text:style-name="T14">if max_num is None or num &gt; max_num:</text:span></text:p>
          <text:p text:style-name="P24"><text:span text:style-name="T14"><text:s text:c="8"/></text:span><text:span text:style-name="T14">max_num = num</text:span></text:p>
          <text:p text:style-name="P24"><text:span text:style-name="T14"><text:s text:c="8"/></text:span></text:p>
          <text:p text:style-name="P24"><text:span text:style-name="T14"><text:s text:c="4"/></text:span><text:span text:style-name="T14">if min_num is None or num &lt; min_num:</text:span></text:p>
          <text:p text:style-name="P24"><text:span text:style-name="T14"><text:s text:c="8"/></text:span><text:span text:style-name="T14">min_num = num</text:span></text:p>
          <text:p text:style-name="P24"><text:span text:style-name="T14"/></text:p>
          <text:p text:style-name="P24"><text:span text:style-name="T14"># Вычисление разницы</text:span></text:p>
          <text:p text:style-name="P24"><text:span text:style-name="T14">difference = max_num - min_num</text:span></text:p>
          <text:p text:style-name="P24"><text:span text:style-name="T14"/></text:p>
          <text:p text:style-name="P24"><text:span text:style-name="T14"># Вывод результатов</text:span></text:p>
          <text:p text:style-name="P24"><text:span text:style-name="T14">print(f"Наибольшее число: {max_num}")</text:span></text:p>
          <text:p text:style-name="P24"><text:span text:style-name="T14">print(f"Наименьшее число: {min_num}")</text:span></text:p>
          <text:p text:style-name="P24"><text:span text:style-name="T14">print(f"Разница между наибольшим и наименьшим: {difference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6" draw:layer="layout" svg:width="16.123cm" svg:height="11.052cm" svg:x="15.877cm" svg:y="5.948cm">
          <draw:text-box>
            <text:p><text:span text:style-name="T15">Введите 10 целых чисел:</text:span></text:p>
            <text:p><text:span text:style-name="T15">Число 1: <text:s/>2</text:span></text:p>
            <text:p><text:span text:style-name="T15">Число 2: <text:s/>5</text:span></text:p>
            <text:p><text:span text:style-name="T15">Число 3: <text:s/>9</text:span></text:p>
            <text:p><text:span text:style-name="T15">Число 4: <text:s/>23</text:span></text:p>
            <text:p><text:span text:style-name="T15">Число 5: <text:s/>29</text:span></text:p>
            <text:p><text:span text:style-name="T15">Число 6: <text:s/>44</text:span></text:p>
            <text:p><text:span text:style-name="T15">Число 7: <text:s/>41</text:span></text:p>
            <text:p><text:span text:style-name="T15">Число 8: <text:s/>75</text:span></text:p>
            <text:p><text:span text:style-name="T15">Число 9: <text:s/>99</text:span></text:p>
            <text:p><text:span text:style-name="T15">Число 10: <text:s/>101</text:span></text:p>
            <text:p><text:span text:style-name="T15">Наибольшее число: 101</text:span></text:p>
            <text:p><text:span text:style-name="T15">Наименьшее число: 2</text:span></text:p>
            <text:p><text:span text:style-name="T15">Разница между наибольшим и наименьшим: 99</text:span></text:p>
            <text:p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массив А из 10 целых чисел. Подсчитать коли" draw:style-name="dp1" draw:master-page-name="Title_20_and_20_Content" presentation:presentation-page-layout-name="AL2T11">
        <draw:custom-shape draw:name="Shape 120" draw:style-name="gr24" draw:text-style-name="P28" draw:layer="layout" svg:width="9.999cm" svg:height="15.677cm" svg:x="1cm" svg:y="3cm">
          <text:p text:style-name="P27"><text:span text:style-name="T16"># Создаем пустой список для хранения чисел</text:span></text:p>
          <text:p text:style-name="P27"><text:span text:style-name="T16">A = []</text:span></text:p>
          <text:p text:style-name="P27"><text:span text:style-name="T16"/></text:p>
          <text:p text:style-name="P27"><text:span text:style-name="T16">print("Введите 10 целых чисел:")</text:span></text:p>
          <text:p text:style-name="P27"><text:span text:style-name="T16">for i in range(10):</text:span></text:p>
          <text:p text:style-name="P27"><text:span text:style-name="T16"><text:s text:c="4"/></text:span><text:span text:style-name="T16">num = int(input(f"Число {i + 1}: "))</text:span></text:p>
          <text:p text:style-name="P27"><text:span text:style-name="T16"><text:s text:c="4"/></text:span><text:span text:style-name="T16">A.append(num)</text:span></text:p>
          <text:p text:style-name="P27"><text:span text:style-name="T16"/></text:p>
          <text:p text:style-name="P27"><text:span text:style-name="T16"># Находим максимальный элемент в массиве</text:span></text:p>
          <text:p text:style-name="P27"><text:span text:style-name="T16">max_element = max(A)</text:span></text:p>
          <text:p text:style-name="P27"><text:span text:style-name="T16"/></text:p>
          <text:p text:style-name="P27"><text:span text:style-name="T16"># Подсчитываем количество элементов, равных максимальному</text:span></text:p>
          <text:p text:style-name="P27"><text:span text:style-name="T16">count_max = 0</text:span></text:p>
          <text:p text:style-name="P27"><text:span text:style-name="T16">for num in A:</text:span></text:p>
          <text:p text:style-name="P27"><text:span text:style-name="T16"><text:s text:c="4"/></text:span><text:span text:style-name="T16">if num == max_element:</text:span></text:p>
          <text:p text:style-name="P27"><text:span text:style-name="T16"><text:s text:c="8"/></text:span><text:span text:style-name="T16">count_max += 1</text:span></text:p>
          <text:p text:style-name="P27"><text:span text:style-name="T16"/></text:p>
          <text:p text:style-name="P27"><text:span text:style-name="T16"># Вывод результата</text:span></text:p>
          <text:p text:style-name="P27"><text:span text:style-name="T16">print(f"Массив: {A}")</text:span></text:p>
          <text:p text:style-name="P27"><text:span text:style-name="T16">print(f"Максимальный элемент: {max_element}")</text:span></text:p>
          <text:p text:style-name="P27"><text:span text:style-name="T16">print(f"Количество чисел, равных максимальному: {count_max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3" draw:layer="layout" svg:width="18.409cm" svg:height="11.052cm" svg:x="14cm" svg:y="4.448cm">
          <draw:text-box>
            <text:p><text:span text:style-name="T4">Введите 10 целых чисел:</text:span></text:p>
            <text:p><text:span text:style-name="T4">Число 1: <text:s/>22</text:span></text:p>
            <text:p><text:span text:style-name="T4">Число 2: <text:s/>-15</text:span></text:p>
            <text:p><text:span text:style-name="T4">Число 3: <text:s/>0</text:span></text:p>
            <text:p><text:span text:style-name="T4">Число 4: <text:s/>-89</text:span></text:p>
            <text:p><text:span text:style-name="T4">Число 5: <text:s/>4</text:span></text:p>
            <text:p><text:span text:style-name="T4">Число 6: <text:s/>60</text:span></text:p>
            <text:p><text:span text:style-name="T4">Число 7: <text:s/>54</text:span></text:p>
            <text:p><text:span text:style-name="T4">Число 8: <text:s/>-9</text:span></text:p>
            <text:p><text:span text:style-name="T4">Число 9: <text:s/>22</text:span></text:p>
            <text:p><text:span text:style-name="T4">Число 10: <text:s/>1</text:span></text:p>
            <text:p><text:span text:style-name="T4">Массив: [22, -15, 0, -89, 4, 60, 54, -9, 22, 1]</text:span></text:p>
            <text:p><text:span text:style-name="T4">Максимальный элемент: 60</text:span></text:p>
            <text:p><text:span text:style-name="T4">Количество чисел, равных максимальному: 1</text:span></text:p>
            <text:p><text:span text:style-name="T4"/></text:p>
          </draw:text-box>
        </draw:frame>
        <draw:frame draw:style-name="gr25" draw:text-style-name="P30" draw:layer="layout" svg:width="32.59cm" svg:height="7.5cm" svg:x="1cm" svg:y="0cm">
          <draw:text-box>
            <text:p text:style-name="P29"><text:span text:style-name="T17">Пользователь вводит массив А из 10 целых чисел. Подсчитать количество чисел, равных максимальному элементу массив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массив А из 10 целых чисел. Подсчитать разн" draw:style-name="dp1" draw:master-page-name="Title_20_and_20_Content" presentation:presentation-page-layout-name="AL2T11">
        <draw:frame draw:name="Shape 122" presentation:style-name="pr4" draw:text-style-name="P12" draw:layer="layout" svg:width="24cm" svg:height="4.362cm" svg:x="0cm" svg:y="0cm" presentation:class="title" presentation:user-transformed="true">
          <draw:text-box>
            <text:p text:style-name="P14"><text:span text:style-name="T11">Пользователь вводит массив А из 10 целых чисел. Подсчитать разницу между суммой всех элементов с четными индексами и суммой всех элементов с нечетными индексами.</text:span></text:p>
          </draw:text-box>
        </draw:frame>
        <draw:custom-shape draw:name="Shape 123" draw:style-name="gr26" draw:text-style-name="P25" draw:layer="layout" svg:width="9.999cm" svg:height="15.501cm" svg:x="0.501cm" svg:y="3.549cm">
          <text:p text:style-name="P24"><text:span text:style-name="T14"># Инициализация списка и переменных для сумм</text:span></text:p>
          <text:p text:style-name="P24"><text:span text:style-name="T14">A = []</text:span></text:p>
          <text:p text:style-name="P24"><text:span text:style-name="T14">sum_even_indices = 0 <text:s/># Сумма элементов с четными индексами (0, 2, 4...)</text:span></text:p>
          <text:p text:style-name="P24"><text:span text:style-name="T14">sum_odd_indices = 0 <text:s text:c="2"/># Сумма элементов с нечетными индексами (1, 3, 5...)</text:span></text:p>
          <text:p text:style-name="P24"><text:span text:style-name="T14"/></text:p>
          <text:p text:style-name="P24"><text:span text:style-name="T14">print("Введите 10 целых чисел:")</text:span></text:p>
          <text:p text:style-name="P24"><text:span text:style-name="T14"/></text:p>
          <text:p text:style-name="P24"><text:span text:style-name="T14">for i in range(10):</text:span></text:p>
          <text:p text:style-name="P24"><text:span text:style-name="T14"><text:s text:c="4"/></text:span><text:span text:style-name="T14">num = int(input(f"Элемент с индексом {i}: "))</text:span></text:p>
          <text:p text:style-name="P24"><text:span text:style-name="T14"><text:s text:c="4"/></text:span><text:span text:style-name="T14">A.append(num)</text:span></text:p>
          <text:p text:style-name="P24"><text:span text:style-name="T14"><text:s text:c="4"/></text:span></text:p>
          <text:p text:style-name="P24"><text:span text:style-name="T14"><text:s text:c="4"/></text:span><text:span text:style-name="T14"># Проверяем четность индекса</text:span></text:p>
          <text:p text:style-name="P24"><text:span text:style-name="T14"><text:s text:c="4"/></text:span><text:span text:style-name="T14">if i % 2 == 0:</text:span></text:p>
          <text:p text:style-name="P24"><text:span text:style-name="T14"><text:s text:c="8"/></text:span><text:span text:style-name="T14">sum_even_indices += num</text:span></text:p>
          <text:p text:style-name="P24"><text:span text:style-name="T14"><text:s text:c="4"/></text:span><text:span text:style-name="T14">else:</text:span></text:p>
          <text:p text:style-name="P24"><text:span text:style-name="T14"><text:s text:c="8"/></text:span><text:span text:style-name="T14">sum_odd_indices += num</text:span></text:p>
          <text:p text:style-name="P24"><text:span text:style-name="T14"/></text:p>
          <text:p text:style-name="P24"><text:span text:style-name="T14"># Вычисляем разницу</text:span></text:p>
          <text:p text:style-name="P24"><text:span text:style-name="T14">difference = sum_even_indices - sum_odd_indices</text:span></text:p>
          <text:p text:style-name="P24"><text:span text:style-name="T14"/></text:p>
          <text:p text:style-name="P24"><text:span text:style-name="T14"># Вывод результатов</text:span></text:p>
          <text:p text:style-name="P24"><text:span text:style-name="T14">print(f"Массив: {A}")</text:span></text:p>
          <text:p text:style-name="P24"><text:span text:style-name="T14">print(f"Сумма элементов с четными индексами: {sum_even_indices}")</text:span></text:p>
          <text:p text:style-name="P24"><text:span text:style-name="T14">print(f"Сумма элементов с нечетными индексами: {sum_odd_indices}")</text:span></text:p>
          <text:p text:style-name="P24"><text:span text:style-name="T14">print(f"Разница (четные индексы - нечетные индексы): {difference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1" draw:layer="layout" svg:width="15.374cm" svg:height="10.872cm" svg:x="14.126cm" svg:y="5cm">
          <draw:text-box>
            <text:p text:style-name="P9"><text:span text:style-name="T15">Введите 10 целых чисел:</text:span></text:p>
            <text:p text:style-name="P9"><text:span text:style-name="T15">Элемент с индексом 0: <text:s/>10</text:span></text:p>
            <text:p text:style-name="P9"><text:span text:style-name="T15">Элемент с индексом 1: <text:s/>21</text:span></text:p>
            <text:p text:style-name="P9"><text:span text:style-name="T15">Элемент с индексом 2: <text:s/>32</text:span></text:p>
            <text:p text:style-name="P9"><text:span text:style-name="T15">Элемент с индексом 3: <text:s/>43</text:span></text:p>
            <text:p text:style-name="P9"><text:span text:style-name="T15">Элемент с индексом 4: <text:s/>54</text:span></text:p>
            <text:p text:style-name="P9"><text:span text:style-name="T15">Элемент с индексом 5: <text:s/>65</text:span></text:p>
            <text:p text:style-name="P9"><text:span text:style-name="T15">Элемент с индексом 6: <text:s/>76</text:span></text:p>
            <text:p text:style-name="P9"><text:span text:style-name="T15">Элемент с индексом 7: <text:s/>87</text:span></text:p>
            <text:p text:style-name="P9"><text:span text:style-name="T15">Элемент с индексом 8: <text:s/>98</text:span></text:p>
            <text:p text:style-name="P9"><text:span text:style-name="T15">Элемент с индексом 9: <text:s/>109</text:span></text:p>
            <text:p text:style-name="P9"><text:span text:style-name="T15">Массив: [10, 21, 32, 43, 54, 65, 76, 87, 98, 109]</text:span></text:p>
            <text:p text:style-name="P9"><text:span text:style-name="T15">Сумма элементов с четными индексами: 270</text:span></text:p>
            <text:p text:style-name="P9"><text:span text:style-name="T15">Сумма элементов с нечетными индексами: 325</text:span></text:p>
            <text:p text:style-name="P9"><text:span text:style-name="T15">Разница (четные индексы - нечетные индексы): -55</text:span></text:p>
            <text:p text:style-name="P9"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считать количество арабских цифр в тексте, введенном пользов" draw:style-name="dp1" draw:master-page-name="Title_20_and_20_Content" presentation:presentation-page-layout-name="AL2T11">
        <draw:frame draw:name="Shape 125" presentation:style-name="pr4" draw:text-style-name="P33" draw:layer="layout" svg:width="29.209cm" svg:height="2.5cm" svg:x="-0.209cm" svg:y="0cm" presentation:class="title" presentation:user-transformed="true">
          <draw:text-box>
            <text:p text:style-name="P32"><text:span text:style-name="T11">Подсчитать количество арабских цифр в тексте, введенном пользователем с клавиатуры.</text:span></text:p>
          </draw:text-box>
        </draw:frame>
        <draw:custom-shape draw:name="Shape 126" draw:style-name="gr28" draw:text-style-name="P8" draw:layer="layout" svg:width="9.999cm" svg:height="13.215cm" svg:x="0.5cm" svg:y="2.5cm">
          <text:p text:style-name="P7"><text:span text:style-name="T3"># Ввод текста от пользователя</text:span></text:p>
          <text:p text:style-name="P7"><text:span text:style-name="T3">text = input("Введите текст: ")</text:span></text:p>
          <text:p text:style-name="P7"><text:span text:style-name="T3"/></text:p>
          <text:p text:style-name="P7"><text:span text:style-name="T3"># Инициализация счетчика</text:span></text:p>
          <text:p text:style-name="P7"><text:span text:style-name="T3">count_digits = 0</text:span></text:p>
          <text:p text:style-name="P7"><text:span text:style-name="T3"/></text:p>
          <text:p text:style-name="P7"><text:span text:style-name="T3"># Проходим по каждому символу в тексте</text:span></text:p>
          <text:p text:style-name="P7"><text:span text:style-name="T3">for char in text:</text:span></text:p>
          <text:p text:style-name="P7"><text:span text:style-name="T3"><text:s text:c="4"/></text:span><text:span text:style-name="T3"># Проверка, является ли символ цифрой</text:span></text:p>
          <text:p text:style-name="P7"><text:span text:style-name="T3"><text:s text:c="4"/></text:span><text:span text:style-name="T3">if char.isdigit():</text:span></text:p>
          <text:p text:style-name="P7"><text:span text:style-name="T3"><text:s text:c="8"/></text:span><text:span text:style-name="T3">count_digits += 1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f"Количество арабских цифр в тексте: {count_digits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4" draw:layer="layout" svg:width="15.794cm" svg:height="3.446cm" svg:x="15.5cm" svg:y="8cm">
          <draw:text-box>
            <text:p text:style-name="P9"><text:span text:style-name="T18">Введите текст: <text:s/>Сегодня 2026 год. Мы пишем код на Python. Это язык 3.6. Он очень мощный и удобный для всех программистов мира. Удачи!</text:span></text:p>
            <text:p text:style-name="P9"><text:span text:style-name="T18">Количество арабских цифр в тексте: 6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брать из строки, введенной пользователем все пробелы, и распеч" draw:style-name="dp1" draw:master-page-name="Title_20_and_20_Content" presentation:presentation-page-layout-name="AL2T11">
        <draw:frame draw:name="Shape 128" presentation:style-name="pr4" draw:text-style-name="P35" draw:layer="layout" svg:width="29.209cm" svg:height="3cm" svg:x="0cm" svg:y="0cm" presentation:class="title" presentation:user-transformed="true">
          <draw:text-box>
            <text:p text:style-name="P14"><text:span text:style-name="T17">Убрать из строки, введенной пользователем все пробелы, и распечатать ее.</text:span></text:p>
          </draw:text-box>
        </draw:frame>
        <draw:custom-shape draw:name="Shape 129" draw:style-name="gr30" draw:text-style-name="P8" draw:layer="layout" svg:width="9.999cm" svg:height="10.167cm" svg:x="1cm" svg:y="5cm">
          <text:p text:style-name="P7"><text:span text:style-name="T3"># Ввод строки от пользователя</text:span></text:p>
          <text:p text:style-name="P7"><text:span text:style-name="T3">text = input("Введите строку: ")</text:span></text:p>
          <text:p text:style-name="P7"><text:span text:style-name="T3"/></text:p>
          <text:p text:style-name="P7"><text:span text:style-name="T3"># Удаление всех пробелов</text:span></text:p>
          <text:p text:style-name="P7"><text:span text:style-name="T3"># Метод replace заменяет все вхождения первого аргумента на второй</text:span></text:p>
          <text:p text:style-name="P7"><text:span text:style-name="T3">text_without_spaces = text.replace(" ", "")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Строка без пробелов:", text_without_spac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4" draw:layer="layout" svg:width="18.006cm" svg:height="4.724cm" svg:x="13.494cm" svg:y="7cm">
          <draw:text-box>
            <text:p text:style-name="P9"><text:span text:style-name="T18">Введите строку: <text:s/>Сегодня 2026 год. Мы пишем код на Python. Это язык 3.6. Он очень мощный и удобный для всех программистов мира. Удачи!</text:span></text:p>
            <text:p text:style-name="P9"><text:span text:style-name="T18">Строка без пробелов: Сегодня2026год.МыпишемкоднаPython.Этоязык3.6.Оноченьмощныйиудобныйдлявсехпрограммистовмира.Удачи!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спечатать первое слово из строки, введенной пользователем с к" draw:style-name="dp1" draw:master-page-name="Title_20_and_20_Content" presentation:presentation-page-layout-name="AL2T11">
        <draw:frame draw:name="Shape 131" presentation:style-name="pr4" draw:text-style-name="P36" draw:layer="layout" svg:width="27.5cm" svg:height="5.5cm" svg:x="0cm" svg:y="0cm" presentation:class="title" presentation:user-transformed="true">
          <draw:text-box>
            <text:p text:style-name="P14"><text:span text:style-name="T19">Распечатать первое слово из строки, введенной пользователем с клавиатуры.</text:span></text:p>
          </draw:text-box>
        </draw:frame>
        <draw:custom-shape draw:name="Shape 132" draw:style-name="gr32" draw:text-style-name="P8" draw:layer="layout" svg:width="9.999cm" svg:height="13.215cm" svg:x="1cm" svg:y="5.5cm">
          <text:p text:style-name="P7"><text:span text:style-name="T3"># Ввод строки от пользователя</text:span></text:p>
          <text:p text:style-name="P7"><text:span text:style-name="T3">text = input("Введите строку: ")</text:span></text:p>
          <text:p text:style-name="P7"><text:span text:style-name="T3"/></text:p>
          <text:p text:style-name="P7"><text:span text:style-name="T3"># Разбиваем строку на слова. </text:span></text:p>
          <text:p text:style-name="P7"><text:span text:style-name="T3"># split() без аргументов автоматически игнорирует несколько пробелов, табуляции и переводы строк</text:span></text:p>
          <text:p text:style-name="P7"><text:span text:style-name="T3">words = text.split()</text:span></text:p>
          <text:p text:style-name="P7"><text:span text:style-name="T3"/></text:p>
          <text:p text:style-name="P7"><text:span text:style-name="T3"># Проверяем, есть ли слова в строке (защита от пустого ввода)</text:span></text:p>
          <text:p text:style-name="P7"><text:span text:style-name="T3">if words:</text:span></text:p>
          <text:p text:style-name="P7"><text:span text:style-name="T3"><text:s text:c="4"/></text:span><text:span text:style-name="T3">print("Первое слово:", words[0])</text:span></text:p>
          <text:p text:style-name="P7"><text:span text:style-name="T3">else:</text:span></text:p>
          <text:p text:style-name="P7"><text:span text:style-name="T3"><text:s text:c="4"/></text:span><text:span text:style-name="T3">print("Вы не ввели ни одного слова.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0" draw:layer="layout" svg:width="16.506cm" svg:height="4.571cm" svg:x="15cm" svg:y="7cm">
          <draw:text-box>
            <text:p text:style-name="P9"><text:span text:style-name="T4">Введите строку: <text:s/>Сегодня 2026 год. Мы пишем код на Python. Это язык 3.6. Он очень мощный и удобный для всех программистов мира. Удачи!</text:span></text:p>
            <text:p text:style-name="P9"><text:span text:style-name="T4">Первое слово: Сегодня</text:span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с клавиатуры текст. Записать его в файл." draw:style-name="dp1" draw:master-page-name="Title_20_and_20_Content" presentation:presentation-page-layout-name="AL2T11">
        <draw:frame draw:name="Shape 134" presentation:style-name="pr4" draw:text-style-name="P15" draw:layer="layout" svg:width="29.209cm" svg:height="6.013cm" svg:x="0cm" svg:y="0cm" presentation:class="title" presentation:user-transformed="true">
          <draw:text-box>
            <text:p text:style-name="P14"><text:span text:style-name="T5">Пользователь вводит с клавиатуры текст. Записать его в файл.</text:span></text:p>
          </draw:text-box>
        </draw:frame>
        <draw:custom-shape draw:name="Shape 135" draw:style-name="gr34" draw:text-style-name="P19" draw:layer="layout" svg:width="9.999cm" svg:height="12.961cm" svg:x="1.001cm" svg:y="5.5cm">
          <text:p text:style-name="P18"><text:span text:style-name="T7"># Ввод текста от пользователя</text:span></text:p>
          <text:p text:style-name="P18"><text:span text:style-name="T7">text = input("Введите текст для записи в файл: ")</text:span></text:p>
          <text:p text:style-name="P18"><text:span text:style-name="T7"/></text:p>
          <text:p text:style-name="P18"><text:span text:style-name="T7"># Имя файла</text:span></text:p>
          <text:p text:style-name="P18"><text:span text:style-name="T7">filename = "output.txt"</text:span></text:p>
          <text:p text:style-name="P18"><text:span text:style-name="T7"/></text:p>
          <text:p text:style-name="P18"><text:span text:style-name="T7"># Запись текста в файл</text:span></text:p>
          <text:p text:style-name="P18"><text:span text:style-name="T7"># 'w' (write) означает режим записи. Если файла нет, он создастся.</text:span></text:p>
          <text:p text:style-name="P18"><text:span text:style-name="T7"># Если файл есть, его содержимое будет перезаписано.</text:span></text:p>
          <text:p text:style-name="P18"><text:span text:style-name="T7"># encoding='utf-8' нужен для корректной работы с русским языком</text:span></text:p>
          <text:p text:style-name="P18"><text:span text:style-name="T7">with open(filename, 'w', encoding='utf-8') as file:</text:span></text:p>
          <text:p text:style-name="P18"><text:span text:style-name="T7"><text:s text:c="4"/></text:span><text:span text:style-name="T7">file.write(text)</text:span></text:p>
          <text:p text:style-name="P18"><text:span text:style-name="T7"/></text:p>
          <text:p text:style-name="P18"><text:span text:style-name="T7">print(f"Текст успешно записан в файл '{filename}'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4" draw:layer="layout" svg:width="18.805cm" svg:height="3.446cm" svg:x="13.695cm" svg:y="7.054cm">
          <draw:text-box>
            <text:p text:style-name="P9"><text:span text:style-name="T18">Введите текст для записи в файл: <text:s/>Сегодня 2026 год. Мы пишем код на Python. Это язык 3.6. Он очень мощный и удобный для всех программистов мира. Удачи!</text:span></text:p>
            <text:p text:style-name="P9"><text:span text:style-name="T18">Текст успешно записан в файл 'output.txt'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исать программу для следующей игры человека с компьютером. Ч" draw:style-name="dp1" draw:master-page-name="Title_20_and_20_Content" presentation:presentation-page-layout-name="AL2T11">
        <draw:custom-shape draw:name="Shape 138" draw:style-name="gr35" draw:text-style-name="P8" draw:layer="layout" svg:width="24.905cm" svg:height="38.36cm" svg:x="0.486cm" svg:y="-9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3" draw:layer="layout" svg:width="34.309cm" svg:height="3.536cm" svg:x="0cm" svg:y="-0.036cm">
          <draw:text-box>
            <text:p><text:span text:style-name="T20">Написать программу для следующей игры человека с компьютером. Человек загадывает некоторое число из диапазона </text:span><text:span text:style-name="T21">[N,M]</text:span><text:span text:style-name="T20">, а компьютер должен отгадать это число за минимальное количество вопросов типа »да-нет» (Ваше число больше 25? Ваше число меньше 70? И т.д.)</text:span></text:p>
          </draw:text-box>
        </draw:frame>
        <draw:frame draw:style-name="gr37" draw:text-style-name="P38" draw:layer="layout" svg:width="5.5cm" svg:height="17cm" svg:x="7.5cm" svg:y="2.5cm">
          <draw:text-box>
            <text:p text:style-name="P37"><text:span text:style-name="T22">import math</text:span></text:p>
            <text:p text:style-name="P37"><text:span text:style-name="T22"/></text:p>
            <text:p text:style-name="P37"><text:span text:style-name="T22">def guess_number_game():</text:span></text:p>
            <text:p text:style-name="P37"><text:span text:style-name="T22"><text:s text:c="4"/></text:span><text:span text:style-name="T22"># 1. Ввод диапазона</text:span></text:p>
            <text:p text:style-name="P37"><text:span text:style-name="T22"><text:s text:c="4"/></text:span><text:span text:style-name="T22">try:</text:span></text:p>
            <text:p text:style-name="P37"><text:span text:style-name="T22"><text:s text:c="8"/></text:span><text:span text:style-name="T22">N = int(input("Введите начало диапазона N: "))</text:span></text:p>
            <text:p text:style-name="P37"><text:span text:style-name="T22"><text:s text:c="8"/></text:span><text:span text:style-name="T22">M = int(input("Введите конец диапазона M: "))</text:span></text:p>
            <text:p text:style-name="P37"><text:span text:style-name="T22"><text:s text:c="4"/></text:span><text:span text:style-name="T22">except ValueError:</text:span></text:p>
            <text:p text:style-name="P37"><text:span text:style-name="T22"><text:s text:c="8"/></text:span><text:span text:style-name="T22">print("❌ Ошибка: введите целые числа.")</text:span></text:p>
            <text:p text:style-name="P37"><text:span text:style-name="T22"><text:s text:c="8"/></text:span><text:span text:style-name="T22">return</text:span></text:p>
            <text:p text:style-name="P37"><text:span text:style-name="T22"/></text:p>
            <text:p text:style-name="P37"><text:span text:style-name="T22"><text:s text:c="4"/></text:span><text:span text:style-name="T22">if N &gt; M:</text:span></text:p>
            <text:p text:style-name="P37"><text:span text:style-name="T22"><text:s text:c="8"/></text:span><text:span text:style-name="T22">print("❌ Ошибка: N не может быть больше M.")</text:span></text:p>
            <text:p text:style-name="P37"><text:span text:style-name="T22"><text:s text:c="8"/></text:span><text:span text:style-name="T22">return</text:span></text:p>
            <text:p text:style-name="P37"><text:span text:style-name="T22"/></text:p>
            <text:p text:style-name="P37"><text:span text:style-name="T22"><text:s text:c="4"/></text:span><text:span text:style-name="T22">low, high = N, M</text:span></text:p>
            <text:p text:style-name="P37"><text:span text:style-name="T22"><text:s text:c="4"/></text:span><text:span text:style-name="T22">attempts = 0</text:span></text:p>
            <text:p text:style-name="P37"><text:span text:style-name="T22"><text:s text:c="4"/></text:span><text:span text:style-name="T22"># Теоретический минимум вопросов для этого диапазона</text:span></text:p>
            <text:p text:style-name="P37"><text:span text:style-name="T22"><text:s text:c="4"/></text:span><text:span text:style-name="T22">min_possible = math.ceil(math.log2(high - low + 1))</text:span></text:p>
            <text:p text:style-name="P37"><text:span text:style-name="T22"/></text:p>
            <text:p text:style-name="P37"><text:span text:style-name="T22"><text:s text:c="4"/></text:span><text:span text:style-name="T22">print(f"\n🔮 Загадайте целое число от {N} до {M} (включительно).")</text:span></text:p>
            <text:p text:style-name="P37"><text:span text:style-name="T22"><text:s text:c="4"/></text:span><text:span text:style-name="T22">print("На вопросы отвечайте символами: <text:s/>'&gt;' (больше), '&lt;' (меньше) или '=' (угадал)")</text:span></text:p>
            <text:p text:style-name="P37"><text:span text:style-name="T22"><text:s text:c="4"/></text:span><text:span text:style-name="T22">print("-" * 50)</text:span></text:p>
            <text:p text:style-name="P37"><text:span text:style-name="T22"/></text:p>
            <text:p text:style-name="P37"><text:span text:style-name="T22"><text:s text:c="4"/></text:span><text:span text:style-name="T22"># 2. Основной цикл угадывания (бинарный поиск)</text:span></text:p>
            <text:p text:style-name="P37"><text:span text:style-name="T22"><text:s text:c="4"/></text:span><text:span text:style-name="T22">while low &lt;= high:</text:span></text:p>
            <text:p text:style-name="P37"><text:span text:style-name="T22"><text:s text:c="8"/></text:span><text:span text:style-name="T22">mid = (low + high) // 2</text:span></text:p>
            <text:p text:style-name="P37"><text:span text:style-name="T22"><text:s text:c="8"/></text:span><text:span text:style-name="T22">attempts += 1</text:span></text:p>
            <text:p text:style-name="P37"><text:span text:style-name="T22"/></text:p>
            <text:p text:style-name="P37"><text:span text:style-name="T22"><text:s text:c="8"/></text:span><text:span text:style-name="T22"># Формируем вопрос</text:span></text:p>
            <text:p text:style-name="P37"><text:span text:style-name="T22"><text:s text:c="8"/></text:span><text:span text:style-name="T22">answer = input(f"Вопрос №{attempts}: Ваше число больше, меньше или равно {mid}? (&gt; &lt; =): ").strip()</text:span></text:p>
            <text:p text:style-name="P37"><text:span text:style-name="T22"/></text:p>
            <text:p text:style-name="P37"><text:span text:style-name="T22"><text:s text:c="8"/></text:span><text:span text:style-name="T22">if answer == '=':</text:span></text:p>
            <text:p text:style-name="P37"><text:span text:style-name="T22"><text:s text:c="12"/></text:span><text:span text:style-name="T22">print(f"\n✅ Я угадал! Ваше число: {mid}")</text:span></text:p>
            <text:p text:style-name="P37"><text:span text:style-name="T22"><text:s text:c="12"/></text:span><text:span text:style-name="T22">print(f"📊 Количество вопросов: {attempts} (теоретический минимум: {min_possible})")</text:span></text:p>
            <text:p text:style-name="P37"><text:span text:style-name="T22"><text:s text:c="12"/></text:span><text:span text:style-name="T22">return</text:span></text:p>
            <text:p text:style-name="P37"><text:span text:style-name="T22"><text:s text:c="8"/></text:span><text:span text:style-name="T22">elif answer == '&gt;':</text:span></text:p>
            <text:p text:style-name="P37"><text:span text:style-name="T22"><text:s text:c="12"/></text:span><text:span text:style-name="T22">low = mid + 1 <text:s text:c="5"/># Число в правой половине</text:span></text:p>
            <text:p text:style-name="P37"><text:span text:style-name="T22"><text:s text:c="8"/></text:span><text:span text:style-name="T22">elif answer == '&lt;':</text:span></text:p>
            <text:p text:style-name="P37"><text:span text:style-name="T22"><text:s text:c="12"/></text:span><text:span text:style-name="T22">high = mid - 1 <text:s text:c="4"/># Число в левой половине</text:span></text:p>
            <text:p text:style-name="P37"><text:span text:style-name="T22"><text:s text:c="8"/></text:span><text:span text:style-name="T22">else:</text:span></text:p>
            <text:p text:style-name="P37"><text:span text:style-name="T22"><text:s text:c="12"/></text:span><text:span text:style-name="T22">print("⚠️ Неверный ввод. Пожалуйста, используйте только &gt;, &lt; или =.")</text:span></text:p>
            <text:p text:style-name="P37"><text:span text:style-name="T22"><text:s text:c="12"/></text:span><text:span text:style-name="T22">attempts -= 1 <text:s text:c="5"/># Не считаем ошибочный ввод</text:span></text:p>
            <text:p text:style-name="P37"><text:span text:style-name="T22"><text:s text:c="12"/></text:span><text:span text:style-name="T22">continue</text:span></text:p>
            <text:p text:style-name="P37"><text:span text:style-name="T22"/></text:p>
            <text:p text:style-name="P37"><text:span text:style-name="T22"><text:s text:c="8"/></text:span><text:span text:style-name="T22"># Защита от противоречивых ответов пользователя</text:span></text:p>
            <text:p text:style-name="P37"><text:span text:style-name="T22"><text:s text:c="8"/></text:span><text:span text:style-name="T22">if low &gt; high:</text:span></text:p>
            <text:p text:style-name="P37"><text:span text:style-name="T22"><text:s text:c="12"/></text:span><text:span text:style-name="T22">print("\n❌ Ошибка: ваши ответы логически противоречивы. Число не найдено.")</text:span></text:p>
            <text:p text:style-name="P37"><text:span text:style-name="T22"><text:s text:c="12"/></text:span><text:span text:style-name="T22">return</text:span></text:p>
            <text:p text:style-name="P37"><text:span text:style-name="T22"/></text:p>
            <text:p text:style-name="P37"><text:span text:style-name="T22">if __name__ == "__main__":</text:span></text:p>
            <text:p text:style-name="P37"><text:span text:style-name="T22"><text:s text:c="4"/></text:span><text:span text:style-name="T22">guess_number_game()</text:span></text:p>
          </draw:text-box>
        </draw:frame>
        <draw:frame draw:style-name="gr38" draw:text-style-name="P40" draw:layer="layout" svg:width="16.589cm" svg:height="7.018cm" svg:x="15.411cm" svg:y="6.482cm">
          <draw:text-box>
            <text:p text:style-name="P39"><text:span text:style-name="T23">Введите начало диапазона N: <text:s/>2</text:span></text:p>
            <text:p text:style-name="P39"><text:span text:style-name="T23">Введите конец диапазона M: <text:s/>89</text:span></text:p>
            <text:p text:style-name="P39"><text:span text:style-name="T23"> </text:span><text:span text:style-name="T23">Загадайте целое число от 2 до 89 (включительно).</text:span></text:p>
            <text:p text:style-name="P39"><text:span text:style-name="T23">На вопросы отвечайте символами: <text:s/>'&gt;' (больше), '&lt;' (меньше) или '=' (угадал)</text:span></text:p>
            <text:p text:style-name="P39"><text:span text:style-name="T23">--------------------------------------------------</text:span></text:p>
            <text:p text:style-name="P39"><text:span text:style-name="T23">Вопрос №1: Ваше число больше, меньше или равно 45? (&gt; &lt; =): <text:s/>нет</text:span></text:p>
            <text:p text:style-name="P39"><text:span text:style-name="T23">⚠️ </text:span><text:span text:style-name="T23">Неверный ввод. Пожалуйста, используйте только &gt;, &lt; или =.</text:span></text:p>
            <text:p text:style-name="P39"><text:span text:style-name="T23">Вопрос №1: Ваше число больше, меньше или равно 45? (&gt; &lt; =): <text:s/>&lt;</text:span></text:p>
            <text:p text:style-name="P39"><text:span text:style-name="T23">Вопрос №2: Ваше число больше, меньше или равно 23? (&gt; &lt; =): <text:s/>&lt;</text:span></text:p>
            <text:p text:style-name="P39"><text:span text:style-name="T23">Вопрос №3: Ваше число больше, меньше или равно 12? (&gt; &lt; =): <text:s/>&lt;</text:span></text:p>
            <text:p text:style-name="P39"><text:span text:style-name="T23">Вопрос №4: Ваше число больше, меньше или равно 6? (&gt; &lt; =): <text:s/>&lt;</text:span></text:p>
            <text:p text:style-name="P39"><text:span text:style-name="T23">Вопрос №5: Ваше число больше, меньше или равно 3? (&gt; &lt; =): <text:s/>&gt;</text:span></text:p>
            <text:p text:style-name="P39"><text:span text:style-name="T23">Вопрос №6: Ваше число больше, меньше или равно 4? (&gt; &lt; =): <text:s/>&gt;</text:span></text:p>
            <text:p text:style-name="P39"><text:span text:style-name="T23">Вопрос №7: Ваше число больше, меньше или равно 5? (&gt; &lt; =): <text:s/>=</text:span></text:p>
            <text:p text:style-name="P39"><text:span text:style-name="T23">✅ </text:span><text:span text:style-name="T23">Я угадал! Ваше число: 5</text:span></text:p>
            <text:p text:style-name="P39"><text:span text:style-name="T23"> </text:span><text:span text:style-name="T23">Количество вопросов: 7 (теоретический минимум: 7)</text:span></text:p>
            <text:p text:style-name="P39"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Mono" svg:font-family="'Liberation Mono', 'Courier New', Cousine, 'DejaVu Sans Mono'" style:font-family-generic="modern" style:font-pitch="variable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90%" fo:text-align="star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/>
    </style:style>
    <style:style style:name="MP14" style:family="paragraph">
      <style:paragraph-properties fo:margin-left="0cm" fo:margin-right="0cm" fo:margin-top="0.176cm" fo:margin-bottom="0cm" fo:line-height="90%" fo:text-align="start" fo:text-indent="0cm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Shape 33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Shape 35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Shape 36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hape 37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Shape 49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Shape 50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1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Shape 52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hape 53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5T20:11:14</meta:creation-date>
    <dc:date>2026-05-18T14:07:42.540335312</dc:date>
    <meta:editing-duration>PT1H55M22S</meta:editing-duration>
    <meta:generator>LibreOffice/7.6.7.2$Linux_X86_64 LibreOffice_project/60$Build-2</meta:generator>
    <meta:editing-cycles>3</meta:editing-cycles>
    <meta:document-statistic meta:object-count="137"/>
    <meta:template xlink:type="simple" xlink:actuate="onRequest" xlink:title="Normal.dotm" xlink:href=""/>
  </office:meta>
</office:document-meta>
</file>