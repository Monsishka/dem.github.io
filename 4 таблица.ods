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6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45cm"/>
    </style:style>
    <style:style style:name="co4" style:family="table-column">
      <style:table-column-properties fo:break-before="auto" style:column-width="2.999cm"/>
    </style:style>
    <style:style style:name="co5" style:family="table-column">
      <style:table-column-properties fo:break-before="auto" style:column-width="4.946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Максимальный показатель</text:p>
          </table:table-cell>
          <table:table-cell table:style-name="ce1" office:value-type="string" calcext:value-type="string">
            <text:p>Сумма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2^([.A2]+1)-1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2^([.A3]+1)-1"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2^([.A4]+1)-1"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2^([.A5]+1)-1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2^([.A6]+1)-1" office:value-type="float" office:value="31" calcext:value-type="float">
            <text:p>3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2^([.A7]+1)-1" office:value-type="float" office:value="63" calcext:value-type="float">
            <text:p>6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2^([.A8]+1)-1" office:value-type="float" office:value="127" calcext:value-type="float">
            <text:p>12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2^([.A9]+1)-1" office:value-type="float" office:value="255" calcext:value-type="float">
            <text:p>25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2^([.A10]+1)-1" office:value-type="float" office:value="511" calcext:value-type="float">
            <text:p>51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2^([.A11]+1)-1" office:value-type="float" office:value="1023" calcext:value-type="float">
            <text:p>102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2^([.A12]+1)-1" office:value-type="float" office:value="2047" calcext:value-type="float">
            <text:p>204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2^([.A13]+1)-1" office:value-type="float" office:value="4095" calcext:value-type="float">
            <text:p>409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2^([.A14]+1)-1" office:value-type="float" office:value="8191" calcext:value-type="float">
            <text:p>819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2^([.A15]+1)-1" office:value-type="float" office:value="16383" calcext:value-type="float">
            <text:p>1638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2^([.A16]+1)-1" office:value-type="float" office:value="32767" calcext:value-type="float">
            <text:p>3276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2^([.A17]+1)-1" office:value-type="float" office:value="65535" calcext:value-type="float">
            <text:p>6553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2^([.A18]+1)-1" office:value-type="float" office:value="131071" calcext:value-type="float">
            <text:p>13107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2^([.A19]+1)-1" office:value-type="float" office:value="262143" calcext:value-type="float">
            <text:p>26214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2^([.A20]+1)-1" office:value-type="float" office:value="524287" calcext:value-type="float">
            <text:p>52428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2^([.A21]+1)-1" office:value-type="float" office:value="1048575" calcext:value-type="float">
            <text:p>104857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2^([.A22]+1)-1" office:value-type="float" office:value="2097151" calcext:value-type="float">
            <text:p>209715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2^([.A23]+1)-1" office:value-type="float" office:value="4194303" calcext:value-type="float">
            <text:p>419430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2^([.A24]+1)-1" office:value-type="float" office:value="8388607" calcext:value-type="float">
            <text:p>8388607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2^([.A25]+1)-1" office:value-type="float" office:value="16777215" calcext:value-type="float">
            <text:p>16777215</text:p>
          </table:table-cell>
        </table:table-row>
        <table:table-row table:style-name="ro2" table:number-rows-repeated="104855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Лист2" table:style-name="ta2">
        <table:table-column table:style-name="co3" table:default-cell-style-name="Default"/>
        <table:table-column table:style-name="co2" table:default-cell-style-name="Default"/>
        <table:table-row table:style-name="ro3">
          <table:table-cell table:style-name="ce1" office:value-type="string" calcext:value-type="string">
            <text:p>Максимальный показатель</text:p>
          </table:table-cell>
          <table:table-cell table:style-name="ce1" office:value-type="string" calcext:value-type="string">
            <text:p>Сумма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(3^([.A2]+1)-1)/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(3^([.A3]+1)-1)/2" office:value-type="float" office:value="4" calcext:value-type="float">
            <text:p>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(3^([.A4]+1)-1)/2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(3^([.A5]+1)-1)/2" office:value-type="float" office:value="40" calcext:value-type="float">
            <text:p>4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(3^([.A6]+1)-1)/2" office:value-type="float" office:value="121" calcext:value-type="float">
            <text:p>12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(3^([.A7]+1)-1)/2" office:value-type="float" office:value="364" calcext:value-type="float">
            <text:p>36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(3^([.A8]+1)-1)/2" office:value-type="float" office:value="1093" calcext:value-type="float">
            <text:p>109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(3^([.A9]+1)-1)/2" office:value-type="float" office:value="3280" calcext:value-type="float">
            <text:p>328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(3^([.A10]+1)-1)/2" office:value-type="float" office:value="9841" calcext:value-type="float">
            <text:p>984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(3^([.A11]+1)-1)/2" office:value-type="float" office:value="29524" calcext:value-type="float">
            <text:p>2952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(3^([.A12]+1)-1)/2" office:value-type="float" office:value="88573" calcext:value-type="float">
            <text:p>8857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(3^([.A13]+1)-1)/2" office:value-type="float" office:value="265720" calcext:value-type="float">
            <text:p>26572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(3^([.A14]+1)-1)/2" office:value-type="float" office:value="797161" calcext:value-type="float">
            <text:p>79716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(3^([.A15]+1)-1)/2" office:value-type="float" office:value="2391484" calcext:value-type="float">
            <text:p>239148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(3^([.A16]+1)-1)/2" office:value-type="float" office:value="7174453" calcext:value-type="float">
            <text:p>717445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(3^([.A17]+1)-1)/2" office:value-type="float" office:value="21523360" calcext:value-type="float">
            <text:p>2152336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(3^([.A18]+1)-1)/2" office:value-type="float" office:value="64570081" calcext:value-type="float">
            <text:p>6457008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(3^([.A19]+1)-1)/2" office:value-type="float" office:value="193710244" calcext:value-type="float">
            <text:p>19371024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(3^([.A20]+1)-1)/2" office:value-type="float" office:value="581130733" calcext:value-type="float">
            <text:p>58113073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(3^([.A21]+1)-1)/2" office:value-type="float" office:value="1743392200" calcext:value-type="float">
            <text:p>174339220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(3^([.A22]+1)-1)/2" office:value-type="float" office:value="5230176601" calcext:value-type="float">
            <text:p>523017660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(3^([.A23]+1)-1)/2" office:value-type="float" office:value="15690529804" calcext:value-type="float">
            <text:p>1569052980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(3^([.A24]+1)-1)/2" office:value-type="float" office:value="47071589413" calcext:value-type="float">
            <text:p>47071589413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(3^([.A25]+1)-1)/2" office:value-type="float" office:value="141214768240" calcext:value-type="float">
            <text:p>141214768240</text:p>
          </table:table-cell>
        </table:table-row>
      </table:table>
      <table:table table:name="Лист3" table:style-name="ta2">
        <table:table-column table:style-name="co4" table:default-cell-style-name="ce3"/>
        <table:table-column table:style-name="co2" table:number-columns-repeated="2" table:default-cell-style-name="ce3"/>
        <table:table-row table:style-name="ro1">
          <table:table-cell table:style-name="ce2" office:value-type="string" calcext:value-type="string">
            <text:p>Максимальный показатель</text:p>
          </table:table-cell>
          <table:table-cell table:style-name="ce2" office:value-type="string" calcext:value-type="string">
            <text:p>Сумма для 2</text:p>
          </table:table-cell>
          <table:table-cell table:style-name="ce2" office:value-type="string" calcext:value-type="string">
            <text:p>Сумма для 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VLOOKUP([.A2];[Лист1.$A$1:.$B$25];2;0)" office:value-type="float" office:value="1" calcext:value-type="float">
            <text:p>1</text:p>
          </table:table-cell>
          <table:table-cell table:formula="of:=VLOOKUP([.A2];[Лист2.$A$1:.$B$25];2;0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VLOOKUP([.A3];[Лист1.$A$1:.$B$25];2;0)" office:value-type="float" office:value="3" calcext:value-type="float">
            <text:p>3</text:p>
          </table:table-cell>
          <table:table-cell table:formula="of:=VLOOKUP([.A3];[Лист2.$A$1:.$B$25];2;0)" office:value-type="float" office:value="4" calcext:value-type="float">
            <text:p>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VLOOKUP([.A4];[Лист1.$A$1:.$B$25];2;0)" office:value-type="float" office:value="7" calcext:value-type="float">
            <text:p>7</text:p>
          </table:table-cell>
          <table:table-cell table:formula="of:=VLOOKUP([.A4];[Лист2.$A$1:.$B$25];2;0)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VLOOKUP([.A5];[Лист1.$A$1:.$B$25];2;0)" office:value-type="float" office:value="15" calcext:value-type="float">
            <text:p>15</text:p>
          </table:table-cell>
          <table:table-cell table:formula="of:=VLOOKUP([.A5];[Лист2.$A$1:.$B$25];2;0)" office:value-type="float" office:value="40" calcext:value-type="float">
            <text:p>4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VLOOKUP([.A6];[Лист1.$A$1:.$B$25];2;0)" office:value-type="float" office:value="31" calcext:value-type="float">
            <text:p>31</text:p>
          </table:table-cell>
          <table:table-cell table:formula="of:=VLOOKUP([.A6];[Лист2.$A$1:.$B$25];2;0)" office:value-type="float" office:value="121" calcext:value-type="float">
            <text:p>12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VLOOKUP([.A7];[Лист1.$A$1:.$B$25];2;0)" office:value-type="float" office:value="63" calcext:value-type="float">
            <text:p>63</text:p>
          </table:table-cell>
          <table:table-cell table:formula="of:=VLOOKUP([.A7];[Лист2.$A$1:.$B$25];2;0)" office:value-type="float" office:value="364" calcext:value-type="float">
            <text:p>36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VLOOKUP([.A8];[Лист1.$A$1:.$B$25];2;0)" office:value-type="float" office:value="127" calcext:value-type="float">
            <text:p>127</text:p>
          </table:table-cell>
          <table:table-cell table:formula="of:=VLOOKUP([.A8];[Лист2.$A$1:.$B$25];2;0)" office:value-type="float" office:value="1093" calcext:value-type="float">
            <text:p>109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VLOOKUP([.A9];[Лист1.$A$1:.$B$25];2;0)" office:value-type="float" office:value="255" calcext:value-type="float">
            <text:p>255</text:p>
          </table:table-cell>
          <table:table-cell table:formula="of:=VLOOKUP([.A9];[Лист2.$A$1:.$B$25];2;0)" office:value-type="float" office:value="3280" calcext:value-type="float">
            <text:p>328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VLOOKUP([.A10];[Лист1.$A$1:.$B$25];2;0)" office:value-type="float" office:value="511" calcext:value-type="float">
            <text:p>511</text:p>
          </table:table-cell>
          <table:table-cell table:formula="of:=VLOOKUP([.A10];[Лист2.$A$1:.$B$25];2;0)" office:value-type="float" office:value="9841" calcext:value-type="float">
            <text:p>984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VLOOKUP([.A11];[Лист1.$A$1:.$B$25];2;0)" office:value-type="float" office:value="1023" calcext:value-type="float">
            <text:p>1023</text:p>
          </table:table-cell>
          <table:table-cell table:formula="of:=VLOOKUP([.A11];[Лист2.$A$1:.$B$25];2;0)" office:value-type="float" office:value="29524" calcext:value-type="float">
            <text:p>2952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VLOOKUP([.A12];[Лист1.$A$1:.$B$25];2;0)" office:value-type="float" office:value="2047" calcext:value-type="float">
            <text:p>2047</text:p>
          </table:table-cell>
          <table:table-cell table:formula="of:=VLOOKUP([.A12];[Лист2.$A$1:.$B$25];2;0)" office:value-type="float" office:value="88573" calcext:value-type="float">
            <text:p>8857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VLOOKUP([.A13];[Лист1.$A$1:.$B$25];2;0)" office:value-type="float" office:value="4095" calcext:value-type="float">
            <text:p>4095</text:p>
          </table:table-cell>
          <table:table-cell table:formula="of:=VLOOKUP([.A13];[Лист2.$A$1:.$B$25];2;0)" office:value-type="float" office:value="265720" calcext:value-type="float">
            <text:p>26572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VLOOKUP([.A14];[Лист1.$A$1:.$B$25];2;0)" office:value-type="float" office:value="8191" calcext:value-type="float">
            <text:p>8191</text:p>
          </table:table-cell>
          <table:table-cell table:formula="of:=VLOOKUP([.A14];[Лист2.$A$1:.$B$25];2;0)" office:value-type="float" office:value="797161" calcext:value-type="float">
            <text:p>79716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VLOOKUP([.A15];[Лист1.$A$1:.$B$25];2;0)" office:value-type="float" office:value="16383" calcext:value-type="float">
            <text:p>16383</text:p>
          </table:table-cell>
          <table:table-cell table:formula="of:=VLOOKUP([.A15];[Лист2.$A$1:.$B$25];2;0)" office:value-type="float" office:value="2391484" calcext:value-type="float">
            <text:p>239148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VLOOKUP([.A16];[Лист1.$A$1:.$B$25];2;0)" office:value-type="float" office:value="32767" calcext:value-type="float">
            <text:p>32767</text:p>
          </table:table-cell>
          <table:table-cell table:formula="of:=VLOOKUP([.A16];[Лист2.$A$1:.$B$25];2;0)" office:value-type="float" office:value="7174453" calcext:value-type="float">
            <text:p>717445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VLOOKUP([.A17];[Лист1.$A$1:.$B$25];2;0)" office:value-type="float" office:value="65535" calcext:value-type="float">
            <text:p>65535</text:p>
          </table:table-cell>
          <table:table-cell table:formula="of:=VLOOKUP([.A17];[Лист2.$A$1:.$B$25];2;0)" office:value-type="float" office:value="21523360" calcext:value-type="float">
            <text:p>2152336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VLOOKUP([.A18];[Лист1.$A$1:.$B$25];2;0)" office:value-type="float" office:value="131071" calcext:value-type="float">
            <text:p>131071</text:p>
          </table:table-cell>
          <table:table-cell table:formula="of:=VLOOKUP([.A18];[Лист2.$A$1:.$B$25];2;0)" office:value-type="float" office:value="64570081" calcext:value-type="float">
            <text:p>6457008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VLOOKUP([.A19];[Лист1.$A$1:.$B$25];2;0)" office:value-type="float" office:value="262143" calcext:value-type="float">
            <text:p>262143</text:p>
          </table:table-cell>
          <table:table-cell table:formula="of:=VLOOKUP([.A19];[Лист2.$A$1:.$B$25];2;0)" office:value-type="float" office:value="193710244" calcext:value-type="float">
            <text:p>19371024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VLOOKUP([.A20];[Лист1.$A$1:.$B$25];2;0)" office:value-type="float" office:value="524287" calcext:value-type="float">
            <text:p>524287</text:p>
          </table:table-cell>
          <table:table-cell table:formula="of:=VLOOKUP([.A20];[Лист2.$A$1:.$B$25];2;0)" office:value-type="float" office:value="581130733" calcext:value-type="float">
            <text:p>58113073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VLOOKUP([.A21];[Лист1.$A$1:.$B$25];2;0)" office:value-type="float" office:value="1048575" calcext:value-type="float">
            <text:p>1048575</text:p>
          </table:table-cell>
          <table:table-cell table:formula="of:=VLOOKUP([.A21];[Лист2.$A$1:.$B$25];2;0)" office:value-type="float" office:value="1743392200" calcext:value-type="float">
            <text:p>174339220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VLOOKUP([.A22];[Лист1.$A$1:.$B$25];2;0)" office:value-type="float" office:value="2097151" calcext:value-type="float">
            <text:p>2097151</text:p>
          </table:table-cell>
          <table:table-cell table:formula="of:=VLOOKUP([.A22];[Лист2.$A$1:.$B$25];2;0)" office:value-type="float" office:value="5230176601" calcext:value-type="float">
            <text:p>523017660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VLOOKUP([.A23];[Лист1.$A$1:.$B$25];2;0)" office:value-type="float" office:value="4194303" calcext:value-type="float">
            <text:p>4194303</text:p>
          </table:table-cell>
          <table:table-cell table:formula="of:=VLOOKUP([.A23];[Лист2.$A$1:.$B$25];2;0)" office:value-type="float" office:value="15690529804" calcext:value-type="float">
            <text:p>1569052980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VLOOKUP([.A24];[Лист1.$A$1:.$B$25];2;0)" office:value-type="float" office:value="8388607" calcext:value-type="float">
            <text:p>8388607</text:p>
          </table:table-cell>
          <table:table-cell table:formula="of:=VLOOKUP([.A24];[Лист2.$A$1:.$B$25];2;0)" office:value-type="float" office:value="47071589413" calcext:value-type="float">
            <text:p>47071589413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VLOOKUP([.A25];[Лист1.$A$1:.$B$25];2;0)" office:value-type="float" office:value="16777215" calcext:value-type="float">
            <text:p>16777215</text:p>
          </table:table-cell>
          <table:table-cell table:formula="of:=VLOOKUP([.A25];[Лист2.$A$1:.$B$25];2;0)" office:value-type="float" office:value="141214768240" calcext:value-type="float">
            <text:p>141214768240</text:p>
          </table:table-cell>
        </table:table-row>
      </table:table>
      <table:table table:name="Лист4" table:style-name="ta2">
        <table:table-column table:style-name="co5" table:default-cell-style-name="ce3"/>
        <table:table-column table:style-name="co2" table:number-columns-repeated="3" table:default-cell-style-name="ce3"/>
        <table:table-row table:style-name="ro1">
          <table:table-cell table:style-name="ce4" office:value-type="string" calcext:value-type="string">
            <text:p>Статистическая функция</text:p>
          </table:table-cell>
          <table:table-cell table:style-name="ce4" office:value-type="string" calcext:value-type="string">
            <text:p>Для А (Лист3)</text:p>
          </table:table-cell>
          <table:table-cell table:style-name="ce4" office:value-type="string" calcext:value-type="string">
            <text:p>Для В (Лист3)</text:p>
          </table:table-cell>
          <table:table-cell table:style-name="ce4" office:value-type="string" calcext:value-type="string">
            <text:p>Для С (Лист3)</text:p>
          </table:table-cell>
        </table:table-row>
        <table:table-row table:style-name="ro2">
          <table:table-cell office:value-type="string" calcext:value-type="string">
            <text:p>Среднее значение</text:p>
          </table:table-cell>
          <table:table-cell table:formula="of:=AVERAGE([Лист3.A2:.A25])" office:value-type="float" office:value="11.5" calcext:value-type="float">
            <text:p>11,5</text:p>
          </table:table-cell>
          <table:table-cell table:formula="of:=AVERAGE([Лист3.B2:.B25])" office:value-type="float" office:value="1398100.25" calcext:value-type="float">
            <text:p>1398100,25</text:p>
          </table:table-cell>
          <table:table-cell table:formula="of:=AVERAGE([Лист3.C2:.C25])" office:value-type="float" office:value="8825923014.5" calcext:value-type="float">
            <text:p>8825923014,5</text:p>
          </table:table-cell>
        </table:table-row>
        <table:table-row table:style-name="ro2">
          <table:table-cell office:value-type="string" calcext:value-type="string">
            <text:p>Максимальное значение</text:p>
          </table:table-cell>
          <table:table-cell table:formula="of:=MAX([Лист3.$A$2:.$A$25])" office:value-type="float" office:value="23" calcext:value-type="float">
            <text:p>23</text:p>
          </table:table-cell>
          <table:table-cell table:formula="of:=MAX([Лист3.$B$2:.$B$25])" office:value-type="float" office:value="16777215" calcext:value-type="float">
            <text:p>16777215</text:p>
          </table:table-cell>
          <table:table-cell table:formula="of:=MAX([Лист3.$C$2:.$C$25])" office:value-type="float" office:value="141214768240" calcext:value-type="float">
            <text:p>141214768240</text:p>
          </table:table-cell>
        </table:table-row>
        <table:table-row table:style-name="ro2">
          <table:table-cell office:value-type="string" calcext:value-type="string">
            <text:p>Минимальное значение</text:p>
          </table:table-cell>
          <table:table-cell table:formula="of:=MIN([Лист3.$A$2:.$A$25])" office:value-type="float" office:value="0" calcext:value-type="float">
            <text:p>0</text:p>
          </table:table-cell>
          <table:table-cell table:formula="of:=MIN([Лист3.$B$2:.$B$25])" office:value-type="float" office:value="1" calcext:value-type="float">
            <text:p>1</text:p>
          </table:table-cell>
          <table:table-cell table:formula="of:=MIN([Лист3.$C$2:.$C$25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Медиана</text:p>
          </table:table-cell>
          <table:table-cell table:formula="of:=MEDIAN([Лист3.$A$2:.$A$25])" office:value-type="float" office:value="11.5" calcext:value-type="float">
            <text:p>11,5</text:p>
          </table:table-cell>
          <table:table-cell table:formula="of:=MEDIAN([Лист3.$B$2:.$B$25])" office:value-type="float" office:value="6143" calcext:value-type="float">
            <text:p>6143</text:p>
          </table:table-cell>
          <table:table-cell table:formula="of:=MEDIAN([Лист3.$C$2:.$C$25])" office:value-type="float" office:value="531440.5" calcext:value-type="float">
            <text:p>531440,5</text:p>
          </table:table-cell>
        </table:table-row>
        <table:table-row table:style-name="ro2">
          <table:table-cell office:value-type="string" calcext:value-type="string">
            <text:p>Мода</text:p>
          </table:table-cell>
          <table:table-cell table:formula="of:=COM.MICROSOFT.MODE.SNGL([Лист3.$A$2:.$A$25])" office:value-type="string" office:string-value="" calcext:value-type="error">
            <text:p>#ЗНАЧ!</text:p>
          </table:table-cell>
          <table:table-cell table:formula="of:=COM.MICROSOFT.MODE.SNGL([Лист3.$B$2:.$B$25])" office:value-type="string" office:string-value="" calcext:value-type="error">
            <text:p>#ЗНАЧ!</text:p>
          </table:table-cell>
          <table:table-cell table:formula="of:=COM.MICROSOFT.MODE.SNGL([Лист3.$C$2:.$C$25])" office:value-type="string" office:string-value="" calcext:value-type="error">
            <text:p>#ЗНАЧ!</text:p>
          </table:table-cell>
        </table:table-row>
        <table:table-row table:style-name="ro2">
          <table:table-cell office:value-type="string" calcext:value-type="string">
            <text:p>Дисперсия</text:p>
          </table:table-cell>
          <table:table-cell table:formula="of:=VAR([Лист3.$A$2:.$A$25])" office:value-type="float" office:value="50" calcext:value-type="float">
            <text:p>50</text:p>
          </table:table-cell>
          <table:table-cell table:formula="of:=VAR([Лист3.$B$2:.$B$25])" office:value-type="float" office:value="14277716453108.8" calcext:value-type="float">
            <text:p>14277716453108,8</text:p>
          </table:table-cell>
          <table:table-cell table:formula="of:=VAR([Лист3.$C$2:.$C$25])" office:value-type="float" office:value="8.94121135033454E+020" calcext:value-type="float">
            <text:p>8,94121135033454E+020</text:p>
          </table:table-cell>
        </table:table-row>
      </table:table>
      <table:table table:name="Лист5" table:style-name="ta2">
        <table:shapes>
          <draw:frame draw:z-index="0" draw:style-name="gr1" draw:text-style-name="P1" svg:width="15.99cm" svg:height="9.004cm" svg:x="2.364cm" svg:y="3.214cm">
            <draw:object draw:notify-on-update-of-ranges="Лист5.A2:Лист5.A2 Лист5.B2:Лист5.H2 Лист5.A3:Лист5.A3 Лист5.B3:Лист5.H3 Лист5.A4:Лист5.A4 Лист5.B4:Лист5.H4 Лист5.A5:Лист5.A5 Лист5.B5:Лист5.H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8" table:default-cell-style-name="Default"/>
        <table:table-row table:style-name="ro2">
          <table:table-cell/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</table:table-row>
        <table:table-row table:style-name="ro2">
          <table:table-cell office:value-type="string" calcext:value-type="string">
            <text:p>Колледж 1</text:p>
          </table:table-cell>
          <table:table-cell office:value-type="float" office:value="1510000" calcext:value-type="float">
            <text:p>1510000</text:p>
          </table:table-cell>
          <table:table-cell office:value-type="float" office:value="2236476" calcext:value-type="float">
            <text:p>2236476</text:p>
          </table:table-cell>
          <table:table-cell office:value-type="float" office:value="1934765" calcext:value-type="float">
            <text:p>1934765</text:p>
          </table:table-cell>
          <table:table-cell office:value-type="float" office:value="4543534" calcext:value-type="float">
            <text:p>4543534</text:p>
          </table:table-cell>
          <table:table-cell office:value-type="float" office:value="2348887" calcext:value-type="float">
            <text:p>2348887</text:p>
          </table:table-cell>
          <table:table-cell office:value-type="float" office:value="1170004" calcext:value-type="float">
            <text:p>1170004</text:p>
          </table:table-cell>
          <table:table-cell office:value-type="float" office:value="2344598" calcext:value-type="float">
            <text:p>2344598</text:p>
          </table:table-cell>
        </table:table-row>
        <table:table-row table:style-name="ro2">
          <table:table-cell office:value-type="string" calcext:value-type="string">
            <text:p>Колледж 2</text:p>
          </table:table-cell>
          <table:table-cell office:value-type="float" office:value="237800" calcext:value-type="float">
            <text:p>237800</text:p>
          </table:table-cell>
          <table:table-cell office:value-type="float" office:value="732647" calcext:value-type="float">
            <text:p>732647</text:p>
          </table:table-cell>
          <table:table-cell office:value-type="float" office:value="567672" calcext:value-type="float">
            <text:p>567672</text:p>
          </table:table-cell>
          <table:table-cell office:value-type="float" office:value="234234" calcext:value-type="float">
            <text:p>234234</text:p>
          </table:table-cell>
          <table:table-cell office:value-type="float" office:value="323217" calcext:value-type="float">
            <text:p>323217</text:p>
          </table:table-cell>
          <table:table-cell office:value-type="float" office:value="634423" calcext:value-type="float">
            <text:p>634423</text:p>
          </table:table-cell>
          <table:table-cell office:value-type="float" office:value="235455" calcext:value-type="float">
            <text:p>235455</text:p>
          </table:table-cell>
        </table:table-row>
        <table:table-row table:style-name="ro2">
          <table:table-cell office:value-type="string" calcext:value-type="string">
            <text:p>Колледж 3</text:p>
          </table:table-cell>
          <table:table-cell office:value-type="float" office:value="3211400" calcext:value-type="float">
            <text:p>3211400</text:p>
          </table:table-cell>
          <table:table-cell office:value-type="float" office:value="4873837" calcext:value-type="float">
            <text:p>4873837</text:p>
          </table:table-cell>
          <table:table-cell office:value-type="float" office:value="3654654" calcext:value-type="float">
            <text:p>3654654</text:p>
          </table:table-cell>
          <table:table-cell office:value-type="float" office:value="3453453" calcext:value-type="float">
            <text:p>3453453</text:p>
          </table:table-cell>
          <table:table-cell office:value-type="float" office:value="5435323" calcext:value-type="float">
            <text:p>5435323</text:p>
          </table:table-cell>
          <table:table-cell office:value-type="float" office:value="4586959" calcext:value-type="float">
            <text:p>4586959</text:p>
          </table:table-cell>
          <table:table-cell office:value-type="float" office:value="8576885" calcext:value-type="float">
            <text:p>8576885</text:p>
          </table:table-cell>
        </table:table-row>
        <table:table-row table:style-name="ro2">
          <table:table-cell office:value-type="string" calcext:value-type="string">
            <text:p>Колледж 4</text:p>
          </table:table-cell>
          <table:table-cell office:value-type="float" office:value="4961201" calcext:value-type="float">
            <text:p>4961201</text:p>
          </table:table-cell>
          <table:table-cell office:value-type="float" office:value="7844962" calcext:value-type="float">
            <text:p>7844962</text:p>
          </table:table-cell>
          <table:table-cell office:value-type="float" office:value="6159094" calcext:value-type="float">
            <text:p>6159094</text:p>
          </table:table-cell>
          <table:table-cell office:value-type="float" office:value="8233225" calcext:value-type="float">
            <text:p>8233225</text:p>
          </table:table-cell>
          <table:table-cell office:value-type="float" office:value="8109432" calcext:value-type="float">
            <text:p>8109432</text:p>
          </table:table-cell>
          <table:table-cell office:value-type="float" office:value="6393392" calcext:value-type="float">
            <text:p>6393392</text:p>
          </table:table-cell>
          <table:table-cell office:value-type="float" office:value="11158945" calcext:value-type="float">
            <text:p>111589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4">00.00.0000</text:date>, <text:time style:data-style-name="N2" text:time-value="09:44:44.553163293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4T09:44:44.693031477</meta:creation-date>
    <dc:title>Таблица</dc:title>
    <meta:generator>LibreOffice/7.6.7.2$Linux_X86_64 LibreOffice_project/60$Build-2</meta:generator>
    <meta:editing-duration>PT1H2M52S</meta:editing-duration>
    <meta:editing-cycles>2</meta:editing-cycles>
    <dc:date>2026-05-04T10:47:36.632908808</dc:date>
    <meta:document-statistic meta:table-count="5" meta:cell-count="242" meta:object-count="1"/>
    <meta:template xlink:type="simple" xlink:actuate="onRequest" xlink:title="Таблица" xlink:href="../../../../../../usr/lib/libreoffice/share/template/common/ШАБЛОН_ЭЛЕКТРОННОЙ_ТАБЛИЦЫ_2019-07-22.ots" meta:date="2026-05-04T09:44:44.56909174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line" chart:style-name="ch1">
        <chart:title svg:x="2.726cm" svg:y="0.316cm" chart:style-name="ch2">
          <text:p>Суммарный доход колледжей от продаж по годам</text:p>
        </chart:title>
        <chart:legend chart:legend-position="bottom" svg:x="2.235cm" svg:y="8.406cm" style:legend-expansion="wide" chart:style-name="ch3"/>
        <chart:plot-area chart:style-name="ch4" table:cell-range-address="Лист5.A2:Лист5.H5" chart:data-source-has-labels="column" svg:x="0.319cm" svg:y="1.275cm" svg:width="15.353cm" svg:height="6.767cm">
          <chart:coordinate-region svg:x="2.052cm" svg:y="1.474cm" svg:width="13.526cm" svg:height="5.92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Лист5.B2:Лист5.H2" chart:label-cell-address="Лист5.A2:Лист5.A2" chart:class="chart:line">
            <chart:data-point chart:repeated="7"/>
          </chart:series>
          <chart:series chart:style-name="ch8" chart:values-cell-range-address="Лист5.B3:Лист5.H3" chart:label-cell-address="Лист5.A3:Лист5.A3" chart:class="chart:line">
            <chart:data-point chart:repeated="7"/>
          </chart:series>
          <chart:series chart:style-name="ch9" chart:values-cell-range-address="Лист5.B4:Лист5.H4" chart:label-cell-address="Лист5.A4:Лист5.A4" chart:class="chart:line">
            <chart:data-point chart:repeated="7"/>
          </chart:series>
          <chart:series chart:style-name="ch10" chart:values-cell-range-address="Лист5.B5:Лист5.H5" chart:label-cell-address="Лист5.A5:Лист5.A5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Колледж 1</text:p>
                <draw:g>
                  <svg:desc>Лист5.A2:Лист5.A2</svg:desc>
                </draw:g>
              </table:table-cell>
              <table:table-cell office:value-type="float" office:value="1510000">
                <text:p>1510000</text:p>
                <draw:g>
                  <svg:desc>Лист5.B2:Лист5.H2</svg:desc>
                </draw:g>
              </table:table-cell>
              <table:table-cell office:value-type="float" office:value="2236476">
                <text:p>2236476</text:p>
              </table:table-cell>
              <table:table-cell office:value-type="float" office:value="1934765">
                <text:p>1934765</text:p>
              </table:table-cell>
              <table:table-cell office:value-type="float" office:value="4543534">
                <text:p>4543534</text:p>
              </table:table-cell>
              <table:table-cell office:value-type="float" office:value="2348887">
                <text:p>2348887</text:p>
              </table:table-cell>
              <table:table-cell office:value-type="float" office:value="1170004">
                <text:p>1170004</text:p>
              </table:table-cell>
              <table:table-cell office:value-type="float" office:value="2344598">
                <text:p>2344598</text:p>
              </table:table-cell>
            </table:table-row>
            <table:table-row>
              <table:table-cell office:value-type="string">
                <text:p>Колледж 2</text:p>
                <draw:g>
                  <svg:desc>Лист5.A3:Лист5.A3</svg:desc>
                </draw:g>
              </table:table-cell>
              <table:table-cell office:value-type="float" office:value="237800">
                <text:p>237800</text:p>
                <draw:g>
                  <svg:desc>Лист5.B3:Лист5.H3</svg:desc>
                </draw:g>
              </table:table-cell>
              <table:table-cell office:value-type="float" office:value="732647">
                <text:p>732647</text:p>
              </table:table-cell>
              <table:table-cell office:value-type="float" office:value="567672">
                <text:p>567672</text:p>
              </table:table-cell>
              <table:table-cell office:value-type="float" office:value="234234">
                <text:p>234234</text:p>
              </table:table-cell>
              <table:table-cell office:value-type="float" office:value="323217">
                <text:p>323217</text:p>
              </table:table-cell>
              <table:table-cell office:value-type="float" office:value="634423">
                <text:p>634423</text:p>
              </table:table-cell>
              <table:table-cell office:value-type="float" office:value="235455">
                <text:p>235455</text:p>
              </table:table-cell>
            </table:table-row>
            <table:table-row>
              <table:table-cell office:value-type="string">
                <text:p>Колледж 3</text:p>
                <draw:g>
                  <svg:desc>Лист5.A4:Лист5.A4</svg:desc>
                </draw:g>
              </table:table-cell>
              <table:table-cell office:value-type="float" office:value="3211400">
                <text:p>3211400</text:p>
                <draw:g>
                  <svg:desc>Лист5.B4:Лист5.H4</svg:desc>
                </draw:g>
              </table:table-cell>
              <table:table-cell office:value-type="float" office:value="4873837">
                <text:p>4873837</text:p>
              </table:table-cell>
              <table:table-cell office:value-type="float" office:value="3654654">
                <text:p>3654654</text:p>
              </table:table-cell>
              <table:table-cell office:value-type="float" office:value="3453453">
                <text:p>3453453</text:p>
              </table:table-cell>
              <table:table-cell office:value-type="float" office:value="5435323">
                <text:p>5435323</text:p>
              </table:table-cell>
              <table:table-cell office:value-type="float" office:value="4586959">
                <text:p>4586959</text:p>
              </table:table-cell>
              <table:table-cell office:value-type="float" office:value="8576885">
                <text:p>8576885</text:p>
              </table:table-cell>
            </table:table-row>
            <table:table-row>
              <table:table-cell office:value-type="string">
                <text:p>Колледж 4</text:p>
                <draw:g>
                  <svg:desc>Лист5.A5:Лист5.A5</svg:desc>
                </draw:g>
              </table:table-cell>
              <table:table-cell office:value-type="float" office:value="4961201">
                <text:p>4961201</text:p>
                <draw:g>
                  <svg:desc>Лист5.B5:Лист5.H5</svg:desc>
                </draw:g>
              </table:table-cell>
              <table:table-cell office:value-type="float" office:value="7844962">
                <text:p>7844962</text:p>
              </table:table-cell>
              <table:table-cell office:value-type="float" office:value="6159094">
                <text:p>6159094</text:p>
              </table:table-cell>
              <table:table-cell office:value-type="float" office:value="8233225">
                <text:p>8233225</text:p>
              </table:table-cell>
              <table:table-cell office:value-type="float" office:value="8109432">
                <text:p>8109432</text:p>
              </table:table-cell>
              <table:table-cell office:value-type="float" office:value="6393392">
                <text:p>6393392</text:p>
              </table:table-cell>
              <table:table-cell office:value-type="float" office:value="11158945">
                <text:p>111589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office:version="1.3">
  <office:styles/>
</office:document-styles>
</file>